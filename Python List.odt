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Helvetica, Arial, sans-serif"/>
  </office:font-face-decls>
  <office:automatic-styles>
    <style:style style:name="P1" style:family="paragraph" style:parent-style-name="Heading_20_2">
      <style:text-properties fo:font-variant="normal" fo:text-transform="none" fo:color="#000000" loext:opacity="87%" style:font-name="Roboto" fo:font-size="18pt" fo:letter-spacing="normal" fo:font-style="normal" fo:font-weight="normal"/>
    </style:style>
    <style:style style:name="P2" style:family="paragraph" style:parent-style-name="Text_20_body">
      <style:paragraph-properties fo:margin-left="0in" fo:margin-right="0in" fo:margin-top="0in" fo:margin-bottom="0.1665in" style:contextual-spacing="false" style:line-height-at-least="0.25in" fo:orphans="2" fo:widows="2" fo:text-indent="0in" style:auto-text-indent="false" fo:padding="0in" fo:border="none"/>
      <style:text-properties fo:font-variant="normal" fo:text-transform="none" fo:color="#000000" loext:opacity="87%" style:font-name="Helvetica" fo:font-size="12.75pt" fo:letter-spacing="normal" fo:font-style="normal" fo:font-weight="normal"/>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margin-top="0in" fo:margin-bottom="0.1665in" style:contextual-spacing="false" style:line-height-at-least="0.25in" fo:orphans="2" fo:widows="2" fo:text-indent="0in" style:auto-text-indent="false" fo:padding="0in" fo:border="none"/>
    </style:style>
    <style:style style:name="P5" style:family="paragraph" style:parent-style-name="Text_20_body">
      <style:paragraph-properties fo:margin-left="0in" fo:margin-right="0in" fo:margin-top="0in" fo:margin-bottom="0in" style:contextual-spacing="false" style:line-height-at-least="0.25in" fo:orphans="2" fo:widows="2" fo:text-indent="0in" style:auto-text-indent="false" fo:padding="0in" fo:border="none"/>
    </style:style>
    <style:style style:name="P6" style:family="paragraph" style:parent-style-name="Heading_20_2">
      <style:text-properties fo:font-variant="normal" fo:text-transform="none" fo:color="#000000" loext:opacity="87%" style:font-name="Roboto" fo:font-size="18pt" fo:letter-spacing="normal" fo:font-style="normal" fo:font-weight="normal"/>
    </style:style>
    <style:style style:name="P7" style:family="paragraph" style:parent-style-name="Heading_20_2">
      <style:text-properties fo:font-variant="normal" fo:text-transform="none" fo:color="#000000" loext:opacity="87%" style:font-name="Roboto" fo:font-size="18pt" fo:letter-spacing="normal" fo:font-style="normal" fo:font-weight="normal" officeooo:paragraph-rsid="0005e87b"/>
    </style:style>
    <style:style style:name="T1" style:family="text">
      <style:text-properties fo:font-variant="normal" fo:text-transform="none" fo:color="#000000" loext:opacity="87%" style:font-name="Helvetica" fo:font-size="12.75pt" fo:letter-spacing="normal" fo:font-style="normal" fo:font-weight="normal"/>
    </style:style>
    <style:style style:name="T2" style:family="text">
      <style:text-properties fo:font-variant="normal" fo:text-transform="none" fo:color="#000000" loext:opacity="87%" style:font-name="Helvetica" fo:font-size="12.75pt" fo:letter-spacing="normal" fo:font-style="normal" style:text-underline-style="solid" style:text-underline-width="auto" style:text-underline-color="font-color" fo:font-weight="normal" loext:padding="0in" loext:border="none"/>
    </style:style>
    <style:style style:name="T3" style:family="text">
      <style:text-properties officeooo:rsid="0005e87b"/>
    </style:style>
    <style:style style:name="fr1" style:family="graphic" style:parent-style-name="OLE">
      <style:graphic-properties fo:margin-left="0in" fo:margin-right="0in" fo:margin-top="0in" fo:margin-bottom="0in" style:vertical-pos="top" style:vertical-rel="baseline" fo:padding="0in" fo:border="none" draw:frame-display-scrollbar="false" draw:frame-display-border="false" draw:frame-margin-horizontal="0px" draw:frame-margin-vertical="0px" draw:ole-draw-aspect="1"/>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frame-display-scrollbar="false" draw:frame-display-border="false" draw:frame-margin-horizontal="0px" draw:frame-margin-vertical="0px" draw:ole-draw-aspect="1"/>
    </style:style>
    <style:style style:name="Sect1" style:family="section">
      <style:section-properties fo:background-color="transparent"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bject1" text:anchor-type="page" text:anchor-page-number="1" svg:x="0in" svg:y="0in" svg:width="8.5in" svg:height="0.0161in" draw:z-index="0">
        <draw:floating-frame xlink:href="https://googleads.g.doubleclick.net/pagead/ads?gdpr=0&amp;us_privacy=1---&amp;gpp_sid=-1&amp;client=ca-pub-2153208817642134&amp;output=html&amp;h=280&amp;adk=2529555209&amp;adf=912056376&amp;pi=t.aa~a.4097345806~i.37~rp.4&amp;w=845&amp;abgtt=3&amp;fwrn=4&amp;fwrnh=100&amp;lmt=1718806213&amp;num_ads=1&amp;rafmt=1&amp;armr=3&amp;sem=mc&amp;pwprc=5856759792&amp;ad_type=text_image&amp;format=845x280&amp;url=https%3A%2F%2Fwww.w3resource.com%2Fpython-exercises%2Flist%2F&amp;fwr=0&amp;pra=3&amp;rh=200&amp;rw=844&amp;rpe=1&amp;resp_fmts=3&amp;wgl=1&amp;fa=27&amp;uach=WyJXaW5kb3dzIiwiMTUuMC4wIiwieDg2IiwiIiwiMTI2LjAuNjQ3OC42MyIsbnVsbCwwLG51bGwsIjY0IixbWyJOb3QvQSlCcmFuZCIsIjguMC4wLjAiXSxbIkNocm9taXVtIiwiMTI2LjAuNjQ3OC42MyJdLFsiR29vZ2xlIENocm9tZSIsIjEyNi4wLjY0NzguNjMiXV0sMF0.&amp;dt=1718806209670&amp;bpp=4&amp;bdt=22900&amp;idt=-M&amp;shv=r20240617&amp;mjsv=m202406180101&amp;ptt=9&amp;saldr=aa&amp;abxe=1&amp;cookie=ID%3Dd974b3177ba64513%3AT%3D1718806199%3ART%3D1718806199%3AS%3DALNI_MbFwKsRJmWvht775e9wjMRFWx4slg&amp;gpic=UID%3D00000e5e95fce72b%3AT%3D1718806199%3ART%3D1718806199%3AS%3DALNI_MZrAnuyutcEO5NlpUK0j6rqRV3zpg&amp;eo_id_str=ID%3D8ded107dbcb4ba86%3AT%3D1718806199%3ART%3D1718806199%3AS%3DAA-AfjY9dq8IFUgm3KoBNyW7Grzy&amp;prev_fmts=468x80%2C360x280%2C300x600%2C300x600%2C0x0&amp;nras=2&amp;correlator=5595927611036&amp;frm=20&amp;pv=1&amp;ga_vid=1381379536.1718806193&amp;ga_sid=1718806196&amp;ga_hid=1037145319&amp;ga_fc=1&amp;u_tz=0&amp;u_his=3&amp;u_h=864&amp;u_w=1536&amp;u_ah=864&amp;u_aw=1536&amp;u_cd=24&amp;u_sd=1.25&amp;dmc=8&amp;adx=275&amp;ady=1356&amp;biw=1519&amp;bih=742&amp;scr_x=0&amp;scr_y=1587&amp;eid=44759842%2C95333248%2C44795921%2C95334508%2C95334525%2C95334572%2C95334578%2C95334829%2C95335896%2C31084705%2C95331954%2C95335292%2C31078663%2C31078665%2C31078668%2C31078670&amp;oid=2&amp;pvsid=441259159997290&amp;tmod=782581798&amp;uas=0&amp;nvt=1&amp;ref=https%3A%2F%2Fwww.google.com%2F&amp;fc=384&amp;brdim=0%2C0%2C0%2C0%2C1536%2C0%2C1536%2C864%2C1536%2C742&amp;vis=1&amp;rsz=%7C%7Cs%7C&amp;abl=NS&amp;fu=128&amp;bc=31&amp;bz=1&amp;td=1&amp;tdf=2&amp;psd=W251bGwsbnVsbCxudWxsLDNd&amp;nt=1&amp;ifi=9&amp;uci=a!9&amp;fsb=1&amp;dtd=3617" xlink:type="simple" xlink:show="embed" xlink:actuate="onLoad" draw:frame-name="aswift_8"/>
      </draw:frame>
      <text:h text:style-name="P1" text:outline-level="2"/>
      <text:h text:style-name="P7" text:outline-level="2"><text:span text:style-name="T3">Note:</text:span><text:bookmark text:name="TOP Copy 1"/><text:span text:style-name="T3">https://www.w3resource.com/python-exercises/list/</text:span></text:h>
      <text:h text:style-name="P1" text:outline-level="2"><text:bookmark text:name="TOP"/>Python List [280 exercises with solution]</text:h>
      <text:p text:style-name="P2">A list is a container which holds comma-separated values (items or elements) between square brackets where items or elements need not all have the same type.</text:p>
      <text:p text:style-name="P4"><text:span text:style-name="Strong_20_Emphasis"><text:span text:style-name="T1">You may read our </text:span></text:span><text:a xlink:type="simple" xlink:href="https://www.w3resource.com/python/python-list.php" office:target-frame-name="_blank" xlink:show="new" text:style-name="Internet_20_link" text:visited-style-name="Visited_20_Internet_20_Link"><text:span text:style-name="Strong_20_Emphasis">Python list</text:span></text:a><text:span text:style-name="Strong_20_Emphasis"><text:span text:style-name="T1"> tutorial before solving the following exercises.</text:span></text:span></text:p>
      <text:p text:style-name="P5"><text:span text:style-name="T1">[</text:span><text:span text:style-name="Strong_20_Emphasis"><text:span text:style-name="Emphasis"><text:span text:style-name="T1">An </text:span></text:span></text:span><text:a xlink:type="simple" xlink:href="https://www.w3resource.com/python-exercises/list/#" text:style-name="Internet_20_link" text:visited-style-name="Visited_20_Internet_20_Link"><text:span text:style-name="Strong_20_Emphasis"><text:span text:style-name="Emphasis"> </text:span></text:span><text:span text:style-name="Strong_20_Emphasis"><text:span text:style-name="Emphasis"><text:span text:style-name="T2">editor</text:span></text:span></text:span></text:a><text:span text:style-name="Strong_20_Emphasis"><text:span text:style-name="Emphasis"><text:span text:style-name="T1"> is available at the bottom of the page to write and execute the </text:span></text:span></text:span><text:a xlink:type="simple" xlink:href="https://www.w3resource.com/python-exercises/list/#" text:style-name="Internet_20_link" text:visited-style-name="Visited_20_Internet_20_Link"><text:span text:style-name="Strong_20_Emphasis"><text:span text:style-name="Emphasis"> </text:span></text:span><text:span text:style-name="Strong_20_Emphasis"><text:span text:style-name="Emphasis"><text:span text:style-name="T2">scripts</text:span></text:span></text:span></text:a><text:span text:style-name="Strong_20_Emphasis"><text:span text:style-name="Emphasis"><text:span text:style-name="T1">.</text:span></text:span></text:span><text:span text:style-name="T1">  </text:span><text:a xlink:type="simple" xlink:href="https://www.w3resource.com/python-exercises/list/#EDITOR" text:style-name="Internet_20_link" text:visited-style-name="Visited_20_Internet_20_Link">Go to the editor</text:a><text:span text:style-name="T1">]</text:span></text:p>
      <text:p text:style-name="P5"><text:span text:style-name="Strong_20_Emphasis"><text:span text:style-name="T1">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um all the items in a list.<text:line-break/></text:span><text:a xlink:type="simple" xlink:href="https://www.w3resource.com/python-exercises/list/python-data-type-list-exercise-1.php" office:target-frame-name="_blank" xlink:show="new" text:style-name="Internet_20_link" text:visited-style-name="Visited_20_Internet_20_Link">Click me to see the sample solution</text:a></text:p>
      <text:p text:style-name="P5"><text:span text:style-name="Strong_20_Emphasis"><text:span text:style-name="T1">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multiply all the items in a list.<text:line-break/></text:span><text:a xlink:type="simple" xlink:href="https://www.w3resource.com/python-exercises/list/python-data-type-list-exercise-2.php" office:target-frame-name="_blank" xlink:show="new" text:style-name="Internet_20_link" text:visited-style-name="Visited_20_Internet_20_Link">Click me to see the sample solution</text:a></text:p>
      <text:p text:style-name="P4"><text:span text:style-name="Strong_20_Emphasis"><text:span text:style-name="T1">3.</text:span></text:span><text:span text:style-name="T1"> Write a Python program to get the largest number from a list.<text:line-break/></text:span><text:a xlink:type="simple" xlink:href="https://www.w3resource.com/python-exercises/list/python-data-type-list-exercise-3.php" office:target-frame-name="_blank" xlink:show="new" text:style-name="Internet_20_link" text:visited-style-name="Visited_20_Internet_20_Link">Click me to see the sample solution</text:a></text:p>
      <text:p text:style-name="P4"><text:span text:style-name="Strong_20_Emphasis"><text:span text:style-name="T1">4.</text:span></text:span><text:span text:style-name="T1"> Write a Python program to get the smallest number from a list.<text:line-break/></text:span><text:a xlink:type="simple" xlink:href="https://www.w3resource.com/python-exercises/list/python-data-type-list-exercise-4.php" office:target-frame-name="_blank" xlink:show="new" text:style-name="Internet_20_link" text:visited-style-name="Visited_20_Internet_20_Link">Click me to see the sample solution</text:a></text:p>
      <text:p text:style-name="P4"><text:span text:style-name="Strong_20_Emphasis"><text:span text:style-name="T1">5.</text:span></text:span><text:span text:style-name="T1"> Write a Python program to count the number of strings from a given list of strings. The string length is 2 or more and the first and last characters are the same.<text:line-break/>Sample List : ['abc', 'xyz', 'aba', '1221']<text:line-break/>Expected Result : 2<text:line-break/></text:span><text:a xlink:type="simple" xlink:href="https://www.w3resource.com/python-exercises/list/python-data-type-list-exercise-5.php" office:target-frame-name="_blank" xlink:show="new" text:style-name="Internet_20_link" text:visited-style-name="Visited_20_Internet_20_Link">Click me to see the sample solution</text:a></text:p>
      <text:p text:style-name="P4"><text:span text:style-name="Strong_20_Emphasis"><text:span text:style-name="T1">6.</text:span></text:span><text:span text:style-name="T1"> Write a Python program to get a list, sorted in increasing order by the last element in each tuple from a given list of non-empty tuples.<text:line-break/>Sample List : [(2, 5), (1, 2), (4, 4), (2, 3), (2, 1)]<text:line-break/>Expected Result : [(2, 1), (1, 2), (2, 3), (4, 4), (2, 5)]<text:line-break/></text:span><text:a xlink:type="simple" xlink:href="https://www.w3resource.com/python-exercises/list/python-data-type-list-exercise-6.php" office:target-frame-name="_blank" xlink:show="new" text:style-name="Internet_20_link" text:visited-style-name="Visited_20_Internet_20_Link">Click me to see the sample solution</text:a></text:p>
      <text:p text:style-name="P5"><text:span text:style-name="Strong_20_Emphasis"><text:span text:style-name="T1">7. </text:span></text:span><text:span text:style-name="T1">Write a </text:span><text:a xlink:type="simple" xlink:href="https://www.w3resource.com/python-exercises/list/#" text:style-name="Internet_20_link" text:visited-style-name="Visited_20_Internet_20_Link"> <text:span text:style-name="T2">Python</text:span></text:a><text:span text:style-name="T1"> program to remove duplicates from a list.<text:line-break/></text:span><text:a xlink:type="simple" xlink:href="https://www.w3resource.com/python-exercises/list/python-data-type-list-exercise-7.php" office:target-frame-name="_blank" xlink:show="new" text:style-name="Internet_20_link" text:visited-style-name="Visited_20_Internet_20_Link">Click me to see the sample solution</text:a></text:p>
      <text:p text:style-name="P5"><text:span text:style-name="Strong_20_Emphasis"><text:span text:style-name="T1">8. </text:span></text:span><text:span text:style-name="T1">Write a </text:span><text:a xlink:type="simple" xlink:href="https://www.w3resource.com/python-exercises/list/#" text:style-name="Internet_20_link" text:visited-style-name="Visited_20_Internet_20_Link"> <text:span text:style-name="T2">Python</text:span></text:a><text:span text:style-name="T1"> program to check if a list is empty or not.<text:line-break/></text:span><text:a xlink:type="simple" xlink:href="https://www.w3resource.com/python-exercises/list/python-data-type-list-exercise-8.php" office:target-frame-name="_blank" xlink:show="new" text:style-name="Internet_20_link" text:visited-style-name="Visited_20_Internet_20_Link">Click me to see the sample solution</text:a></text:p>
      <text:p text:style-name="P4"><text:soft-page-break/><text:span text:style-name="Strong_20_Emphasis"><text:span text:style-name="T1">9. </text:span></text:span><text:span text:style-name="T1">Write a Python program to clone or copy a list.<text:line-break/></text:span><text:a xlink:type="simple" xlink:href="https://www.w3resource.com/python-exercises/list/python-data-type-list-exercise-9.php" office:target-frame-name="_blank" xlink:show="new" text:style-name="Internet_20_link" text:visited-style-name="Visited_20_Internet_20_Link">Click me to see the sample solution</text:a></text:p>
      <text:p text:style-name="P4"><text:span text:style-name="Strong_20_Emphasis"><text:span text:style-name="T1">10. </text:span></text:span><text:span text:style-name="T1">Write a Python program to find the list of words that are longer than n from a given list of words.<text:line-break/></text:span><text:a xlink:type="simple" xlink:href="https://www.w3resource.com/python-exercises/list/python-data-type-list-exercise-10.php" office:target-frame-name="_blank" xlink:show="new" text:style-name="Internet_20_link" text:visited-style-name="Visited_20_Internet_20_Link">Click me to see the sample solution</text:a></text:p>
      <text:p text:style-name="P4"><text:span text:style-name="Strong_20_Emphasis"><text:span text:style-name="T1">11. </text:span></text:span><text:span text:style-name="T1">Write a Python function that takes two lists and returns True if they have at least one common member.<text:line-break/></text:span><text:a xlink:type="simple" xlink:href="https://www.w3resource.com/python-exercises/list/python-data-type-list-exercise-11.php" office:target-frame-name="_blank" xlink:show="new" text:style-name="Internet_20_link" text:visited-style-name="Visited_20_Internet_20_Link">Click me to see the sample solution</text:a></text:p>
      <text:section text:style-name="Sect1" text:name="aswift_8_host">
        <text:p text:style-name="P3"/>
      </text:section>
      <text:p text:style-name="P4"><text:span text:style-name="Strong_20_Emphasis"><text:span text:style-name="T1">12. </text:span></text:span><text:span text:style-name="T1">Write a Python program to print a specified list after removing the 0th, 4th and 5th elements.<text:line-break/>Sample List : ['Red', 'Green', 'White', 'Black', 'Pink', 'Yellow']<text:line-break/>Expected Output : ['Green', 'White', 'Black']<text:line-break/></text:span><text:a xlink:type="simple" xlink:href="https://www.w3resource.com/python-exercises/list/python-data-type-list-exercise-12.php" office:target-frame-name="_blank" xlink:show="new" text:style-name="Internet_20_link" text:visited-style-name="Visited_20_Internet_20_Link">Click me to see the sample solution</text:a></text:p>
      <text:p text:style-name="P5"><text:span text:style-name="Strong_20_Emphasis"><text:span text:style-name="T1">13. </text:span></text:span><text:span text:style-name="T1">Write a </text:span><text:a xlink:type="simple" xlink:href="https://www.w3resource.com/python-exercises/list/#" text:style-name="Internet_20_link" text:visited-style-name="Visited_20_Internet_20_Link"> <text:span text:style-name="T2">Python</text:span></text:a><text:span text:style-name="T1"> program to generate a 3*4*6 3D array whose each element is *.<text:line-break/></text:span><text:a xlink:type="simple" xlink:href="https://www.w3resource.com/python-exercises/list/python-data-type-list-exercise-13.php" office:target-frame-name="_blank" xlink:show="new" text:style-name="Internet_20_link" text:visited-style-name="Visited_20_Internet_20_Link">Click me to see the sample solution</text:a></text:p>
      <text:p text:style-name="P5"><text:span text:style-name="Strong_20_Emphasis"><text:span text:style-name="T1">14. </text:span></text:span><text:span text:style-name="T1">Write a </text:span><text:a xlink:type="simple" xlink:href="https://www.w3resource.com/python-exercises/list/#" text:style-name="Internet_20_link" text:visited-style-name="Visited_20_Internet_20_Link"> <text:span text:style-name="T2">Python</text:span></text:a><text:span text:style-name="T1"> program to print the numbers of a specified list after removing even numbers from it.<text:line-break/></text:span><text:a xlink:type="simple" xlink:href="https://www.w3resource.com/python-exercises/list/python-data-type-list-exercise-14.php" office:target-frame-name="_blank" xlink:show="new" text:style-name="Internet_20_link" text:visited-style-name="Visited_20_Internet_20_Link">Click me to see the sample solution</text:a></text:p>
      <text:p text:style-name="P4"><text:span text:style-name="Strong_20_Emphasis"><text:span text:style-name="T1">15. </text:span></text:span><text:span text:style-name="T1">Write a Python program to shuffle and print a specified list.<text:line-break/></text:span><text:a xlink:type="simple" xlink:href="https://www.w3resource.com/python-exercises/list/python-data-type-list-exercise-15.php" office:target-frame-name="_blank" xlink:show="new" text:style-name="Internet_20_link" text:visited-style-name="Visited_20_Internet_20_Link">Click me to see the sample solution</text:a></text:p>
      <text:p text:style-name="P4"><text:span text:style-name="Strong_20_Emphasis"><text:span text:style-name="T1">16. </text:span></text:span><text:span text:style-name="T1">Write a Python program to generate and print a list of the first and last 5 elements where the values are square numbers between 1 and 30 (both included).<text:line-break/></text:span><text:a xlink:type="simple" xlink:href="https://www.w3resource.com/python-exercises/list/python-data-type-list-exercise-16.php" office:target-frame-name="_blank" xlink:show="new" text:style-name="Internet_20_link" text:visited-style-name="Visited_20_Internet_20_Link">Click me to see the sample solution</text:a></text:p>
      <text:p text:style-name="P4"><text:span text:style-name="Strong_20_Emphasis"><text:span text:style-name="T1">17.</text:span></text:span><text:span text:style-name="T1"> Write a Python program to check if each number is prime in a given list of numbers. Return True if all numbers are prime otherwise False.<text:line-break/></text:span><text:span text:style-name="Strong_20_Emphasis"><text:span text:style-name="T1">Sample Data:</text:span></text:span><text:span text:style-name="T1"><text:line-break/>([0, 3, 4, 7, 9]) -&gt; False<text:line-break/>([3, 5, 7, 13]) -&gt; True<text:line-break/>([1, 5, 3]) -&gt; False<text:line-break/></text:span><text:a xlink:type="simple" xlink:href="https://www.w3resource.com/python-exercises/list/python-data-type-list-exercise-17.php" office:target-frame-name="_blank" xlink:show="new" text:style-name="Internet_20_link" text:visited-style-name="Visited_20_Internet_20_Link">Click me to see the sample solution</text:a></text:p>
      <text:p text:style-name="P5"><text:soft-page-break/><text:span text:style-name="Strong_20_Emphasis"><text:span text:style-name="T1">18. </text:span></text:span><text:span text:style-name="T1">Write a </text:span><text:a xlink:type="simple" xlink:href="https://www.w3resource.com/python-exercises/list/#" text:style-name="Internet_20_link" text:visited-style-name="Visited_20_Internet_20_Link"> <text:span text:style-name="T2">Python</text:span></text:a><text:span text:style-name="T1"> program to generate all permutations of a list in </text:span><text:a xlink:type="simple" xlink:href="https://www.w3resource.com/python-exercises/list/#" text:style-name="Internet_20_link" text:visited-style-name="Visited_20_Internet_20_Link"> <text:span text:style-name="T2">Python</text:span></text:a><text:span text:style-name="T1">.<text:line-break/></text:span><text:a xlink:type="simple" xlink:href="https://www.w3resource.com/python-exercises/list/python-data-type-list-exercise-18.php" office:target-frame-name="_blank" xlink:show="new" text:style-name="Internet_20_link" text:visited-style-name="Visited_20_Internet_20_Link">Click me to see the sample solution</text:a></text:p>
      <text:p text:style-name="P4"><text:span text:style-name="Strong_20_Emphasis"><text:span text:style-name="T1">19. </text:span></text:span><text:span text:style-name="T1">Write a Python program to calculate the difference between the two lists.<text:line-break/></text:span><text:a xlink:type="simple" xlink:href="https://www.w3resource.com/python-exercises/list/python-data-type-list-exercise-19.php" office:target-frame-name="_blank" xlink:show="new" text:style-name="Internet_20_link" text:visited-style-name="Visited_20_Internet_20_Link">Click me to see the sample solution</text:a></text:p>
      <text:p text:style-name="P4"><text:span text:style-name="Strong_20_Emphasis"><text:span text:style-name="T1">20. </text:span></text:span><text:span text:style-name="T1">Write a Python program to access the index of a list.<text:line-break/></text:span><text:a xlink:type="simple" xlink:href="https://www.w3resource.com/python-exercises/list/python-data-type-list-exercise-20.php" office:target-frame-name="_blank" xlink:show="new" text:style-name="Internet_20_link" text:visited-style-name="Visited_20_Internet_20_Link">Click me to see the sample solution</text:a></text:p>
      <text:p text:style-name="P4"><text:span text:style-name="Strong_20_Emphasis"><text:span text:style-name="T1">21. </text:span></text:span><text:span text:style-name="T1">Write a Python program to convert a list of characters into a string.<text:line-break/></text:span><text:a xlink:type="simple" xlink:href="https://www.w3resource.com/python-exercises/list/python-data-type-list-exercise-21.php" office:target-frame-name="_blank" xlink:show="new" text:style-name="Internet_20_link" text:visited-style-name="Visited_20_Internet_20_Link">Click me to see the sample solution</text:a></text:p>
      <text:p text:style-name="P4"><text:span text:style-name="Strong_20_Emphasis"><text:span text:style-name="T1">22. </text:span></text:span><text:span text:style-name="T1">Write a Python program to find the index of an item in a specified list.<text:line-break/></text:span><text:a xlink:type="simple" xlink:href="https://www.w3resource.com/python-exercises/list/python-data-type-list-exercise-22.php" office:target-frame-name="_blank" xlink:show="new" text:style-name="Internet_20_link" text:visited-style-name="Visited_20_Internet_20_Link">Click me to see the sample solution</text:a></text:p>
      <text:p text:style-name="P4"><text:span text:style-name="Strong_20_Emphasis"><text:span text:style-name="T1">23. </text:span></text:span><text:span text:style-name="T1">Write a Python program to flatten a shallow list.<text:line-break/></text:span><text:a xlink:type="simple" xlink:href="https://www.w3resource.com/python-exercises/list/python-data-type-list-exercise-23.php" office:target-frame-name="_blank" xlink:show="new" text:style-name="Internet_20_link" text:visited-style-name="Visited_20_Internet_20_Link">Click me to see the sample solution</text:a></text:p>
      <text:p text:style-name="P4"><text:span text:style-name="Strong_20_Emphasis"><text:span text:style-name="T1">24. </text:span></text:span><text:span text:style-name="T1">Write a Python program to append a list to the second list.<text:line-break/></text:span><text:a xlink:type="simple" xlink:href="https://www.w3resource.com/python-exercises/list/python-data-type-list-exercise-24.php" office:target-frame-name="_blank" xlink:show="new" text:style-name="Internet_20_link" text:visited-style-name="Visited_20_Internet_20_Link">Click me to see the sample solution</text:a></text:p>
      <text:p text:style-name="P4"><text:span text:style-name="Strong_20_Emphasis"><text:span text:style-name="T1">25. </text:span></text:span><text:span text:style-name="T1">Write a Python program to select an item randomly from a list.<text:line-break/></text:span><text:a xlink:type="simple" xlink:href="https://www.w3resource.com/python-exercises/list/python-data-type-list-exercise-25.php" office:target-frame-name="_blank" xlink:show="new" text:style-name="Internet_20_link" text:visited-style-name="Visited_20_Internet_20_Link">Click me to see the sample solution</text:a></text:p>
      <text:p text:style-name="P5"><text:span text:style-name="Strong_20_Emphasis"><text:span text:style-name="T1">26. </text:span></text:span><text:span text:style-name="T1">Write a </text:span><text:a xlink:type="simple" xlink:href="https://www.w3resource.com/python-exercises/list/#" text:style-name="Internet_20_link" text:visited-style-name="Visited_20_Internet_20_Link"> <text:span text:style-name="T2">Python</text:span></text:a><text:span text:style-name="T1"> program to check whether two lists are circularly identical.<text:line-break/></text:span><text:a xlink:type="simple" xlink:href="https://www.w3resource.com/python-exercises/list/python-data-type-list-exercise-26.php" office:target-frame-name="_blank" xlink:show="new" text:style-name="Internet_20_link" text:visited-style-name="Visited_20_Internet_20_Link">Click me to see the sample solution</text:a></text:p>
      <text:p text:style-name="P5"><text:span text:style-name="Strong_20_Emphasis"><text:span text:style-name="T1">27. </text:span></text:span><text:span text:style-name="T1">Write a </text:span><text:a xlink:type="simple" xlink:href="https://www.w3resource.com/python-exercises/list/#" text:style-name="Internet_20_link" text:visited-style-name="Visited_20_Internet_20_Link"> <text:span text:style-name="T2">Python</text:span></text:a><text:span text:style-name="T1"> program to find the second smallest number in a list.<text:line-break/></text:span><text:a xlink:type="simple" xlink:href="https://www.w3resource.com/python-exercises/list/python-data-type-list-exercise-27.php" office:target-frame-name="_blank" xlink:show="new" text:style-name="Internet_20_link" text:visited-style-name="Visited_20_Internet_20_Link">Click me to see the sample solution</text:a></text:p>
      <text:p text:style-name="P4"><text:span text:style-name="Strong_20_Emphasis"><text:span text:style-name="T1">28. </text:span></text:span><text:span text:style-name="T1">Write a Python program to find the second largest number in a list.<text:line-break/></text:span><text:a xlink:type="simple" xlink:href="https://www.w3resource.com/python-exercises/list/python-data-type-list-exercise-28.php" office:target-frame-name="_blank" xlink:show="new" text:style-name="Internet_20_link" text:visited-style-name="Visited_20_Internet_20_Link">Click me to see the sample solution</text:a></text:p>
      <text:p text:style-name="P4"><text:span text:style-name="Strong_20_Emphasis"><text:span text:style-name="T1">29. </text:span></text:span><text:span text:style-name="T1">Write a Python program to get unique values from a list.<text:line-break/></text:span><text:a xlink:type="simple" xlink:href="https://www.w3resource.com/python-exercises/list/python-data-type-list-exercise-29.php" office:target-frame-name="_blank" xlink:show="new" text:style-name="Internet_20_link" text:visited-style-name="Visited_20_Internet_20_Link">Click me to see the sample solution</text:a></text:p>
      <text:p text:style-name="P4"><text:span text:style-name="Strong_20_Emphasis"><text:span text:style-name="T1">30. </text:span></text:span><text:span text:style-name="T1">Write a Python program to get the frequency of elements in a list.<text:line-break/></text:span><text:a xlink:type="simple" xlink:href="https://www.w3resource.com/python-exercises/list/python-data-type-list-exercise-30.php" office:target-frame-name="_blank" xlink:show="new" text:style-name="Internet_20_link" text:visited-style-name="Visited_20_Internet_20_Link">Click me to see the sample solution</text:a></text:p>
      <text:p text:style-name="P4"><text:span text:style-name="Strong_20_Emphasis"><text:span text:style-name="T1">31. </text:span></text:span><text:span text:style-name="T1">Write a Python program to count the number of elements in a list within a specified range.<text:line-break/></text:span><text:a xlink:type="simple" xlink:href="https://www.w3resource.com/python-exercises/list/python-data-type-list-exercise-31.php" office:target-frame-name="_blank" xlink:show="new" text:style-name="Internet_20_link" text:visited-style-name="Visited_20_Internet_20_Link">Click me to see the sample solution</text:a></text:p>
      <text:p text:style-name="P4"><text:soft-page-break/><text:span text:style-name="Strong_20_Emphasis"><text:span text:style-name="T1">32. </text:span></text:span><text:span text:style-name="T1">Write a Python program to check whether a list contains a sublist.<text:line-break/></text:span><text:a xlink:type="simple" xlink:href="https://www.w3resource.com/python-exercises/list/python-data-type-list-exercise-32.php" office:target-frame-name="_blank" xlink:show="new" text:style-name="Internet_20_link" text:visited-style-name="Visited_20_Internet_20_Link">Click me to see the sample solution</text:a></text:p>
      <text:p text:style-name="P5"><text:span text:style-name="Strong_20_Emphasis"><text:span text:style-name="T1">33. </text:span></text:span><text:span text:style-name="T1">Write a </text:span><text:a xlink:type="simple" xlink:href="https://www.w3resource.com/python-exercises/list/#" text:style-name="Internet_20_link" text:visited-style-name="Visited_20_Internet_20_Link"> <text:span text:style-name="T2">Python</text:span></text:a><text:span text:style-name="T1"> program to generate all sublists of a list.<text:line-break/></text:span><text:a xlink:type="simple" xlink:href="https://www.w3resource.com/python-exercises/list/python-data-type-list-exercise-33.php" office:target-frame-name="_blank" xlink:show="new" text:style-name="Internet_20_link" text:visited-style-name="Visited_20_Internet_20_Link">Click me to see the sample solution</text:a></text:p>
      <text:p text:style-name="P5"><text:span text:style-name="Strong_20_Emphasis"><text:span text:style-name="T1">34. </text:span></text:span><text:span text:style-name="T1">Write a </text:span><text:a xlink:type="simple" xlink:href="https://www.w3resource.com/python-exercises/list/#" text:style-name="Internet_20_link" text:visited-style-name="Visited_20_Internet_20_Link"> <text:span text:style-name="T2">Python</text:span></text:a><text:span text:style-name="T1"> program that uses the Sieve of Eratosthenes method to compute prime numbers up to a specified number.<text:line-break/>Note: In mathematics, the sieve of Eratosthenes, (Ancient Greek: κόσκινον Ἐρατοσθένους, kóskinon Eratosthénous) one of a number of prime number sieves, is a simple, ancient algorithm for finding all prime numbers up to any given limit.<text:line-break/></text:span><text:a xlink:type="simple" xlink:href="https://www.w3resource.com/python-exercises/list/python-data-type-list-exercise-34.php" office:target-frame-name="_blank" xlink:show="new" text:style-name="Internet_20_link" text:visited-style-name="Visited_20_Internet_20_Link">Click me to see the sample solution</text:a></text:p>
      <text:p text:style-name="P4"><text:span text:style-name="Strong_20_Emphasis"><text:span text:style-name="T1">35. </text:span></text:span><text:span text:style-name="T1">Write a Python program to create a list by concatenating a given list with a range from 1 to n.<text:line-break/>Sample list : ['p', 'q']<text:line-break/>n =5<text:line-break/>Sample Output : ['p1', 'q1', 'p2', 'q2', 'p3', 'q3', 'p4', 'q4', 'p5', 'q5']<text:line-break/></text:span><text:a xlink:type="simple" xlink:href="https://www.w3resource.com/python-exercises/list/python-data-type-list-exercise-35.php" office:target-frame-name="_blank" xlink:show="new" text:style-name="Internet_20_link" text:visited-style-name="Visited_20_Internet_20_Link">Click me to see the sample solution</text:a></text:p>
      <text:p text:style-name="P5"><text:span text:style-name="Strong_20_Emphasis"><text:span text:style-name="T1">36. </text:span></text:span><text:span text:style-name="T1">Write a </text:span><text:a xlink:type="simple" xlink:href="https://www.w3resource.com/python-exercises/list/#" text:style-name="Internet_20_link" text:visited-style-name="Visited_20_Internet_20_Link"> <text:span text:style-name="T2">Python</text:span></text:a><text:span text:style-name="T1"> program to get a variable with an identification number or string.<text:line-break/></text:span><text:a xlink:type="simple" xlink:href="https://www.w3resource.com/python-exercises/list/python-data-type-list-exercise-36.php" office:target-frame-name="_blank" xlink:show="new" text:style-name="Internet_20_link" text:visited-style-name="Visited_20_Internet_20_Link">Click me to see the sample solution</text:a></text:p>
      <text:p text:style-name="P5"><text:span text:style-name="Strong_20_Emphasis"><text:span text:style-name="T1">37. </text:span></text:span><text:span text:style-name="T1">Write a </text:span><text:a xlink:type="simple" xlink:href="https://www.w3resource.com/python-exercises/list/#" text:style-name="Internet_20_link" text:visited-style-name="Visited_20_Internet_20_Link"> <text:span text:style-name="T2">Python</text:span></text:a><text:span text:style-name="T1"> program to find common items in two lists.<text:line-break/></text:span><text:a xlink:type="simple" xlink:href="https://www.w3resource.com/python-exercises/list/python-data-type-list-exercise-37.php" office:target-frame-name="_blank" xlink:show="new" text:style-name="Internet_20_link" text:visited-style-name="Visited_20_Internet_20_Link">Click me to see the sample solution</text:a></text:p>
      <text:p text:style-name="P4"><text:span text:style-name="Strong_20_Emphasis"><text:span text:style-name="T1">38. </text:span></text:span><text:span text:style-name="T1">Write a Python program to change the position of every n-th value to the (n+1)th in a list.<text:line-break/>Sample list: [0,1,2,3,4,5]<text:line-break/>Expected Output: [1, 0, 3, 2, 5, 4]<text:line-break/></text:span><text:a xlink:type="simple" xlink:href="https://www.w3resource.com/python-exercises/list/python-data-type-list-exercise-38.php" office:target-frame-name="_blank" xlink:show="new" text:style-name="Internet_20_link" text:visited-style-name="Visited_20_Internet_20_Link">Click me to see the sample solution</text:a></text:p>
      <text:p text:style-name="P4"><text:span text:style-name="Strong_20_Emphasis"><text:span text:style-name="T1">39. </text:span></text:span><text:span text:style-name="T1">Write a Python program to convert a list of multiple integers into a single integer.<text:line-break/>Sample list: [11, 33, 50]<text:line-break/>Expected Output: 113350<text:line-break/></text:span><text:a xlink:type="simple" xlink:href="https://www.w3resource.com/python-exercises/list/python-data-type-list-exercise-39.php" office:target-frame-name="_blank" xlink:show="new" text:style-name="Internet_20_link" text:visited-style-name="Visited_20_Internet_20_Link">Click me to see the sample solution</text:a></text:p>
      <text:p text:style-name="P4"><text:span text:style-name="Strong_20_Emphasis"><text:span text:style-name="T1">40. </text:span></text:span><text:span text:style-name="T1">Write a Python program to split a list based on the first character of a word.<text:line-break/></text:span><text:a xlink:type="simple" xlink:href="https://www.w3resource.com/python-exercises/list/python-data-type-list-exercise-40.php" office:target-frame-name="_blank" xlink:show="new" text:style-name="Internet_20_link" text:visited-style-name="Visited_20_Internet_20_Link">Click me to see the sample solution</text:a></text:p>
      <text:p text:style-name="P5"><text:span text:style-name="Strong_20_Emphasis"><text:span text:style-name="T1">41. </text:span></text:span><text:span text:style-name="T1">Write a </text:span><text:a xlink:type="simple" xlink:href="https://www.w3resource.com/python-exercises/list/#" text:style-name="Internet_20_link" text:visited-style-name="Visited_20_Internet_20_Link"> <text:span text:style-name="T2">Python</text:span></text:a><text:span text:style-name="T1"> program to create multiple lists.<text:line-break/></text:span><text:a xlink:type="simple" xlink:href="https://www.w3resource.com/python-exercises/list/python-data-type-list-exercise-41.php" office:target-frame-name="_blank" xlink:show="new" text:style-name="Internet_20_link" text:visited-style-name="Visited_20_Internet_20_Link">Click me to see the sample solution</text:a></text:p>
      <text:p text:style-name="P4"><text:soft-page-break/><text:span text:style-name="Strong_20_Emphasis"><text:span text:style-name="T1">42.</text:span></text:span><text:span text:style-name="T1"> Write a Python program to find missing and additional values in two lists.<text:line-break/>Sample data : Missing values in second list: b,a,c<text:line-break/>Additional values in second list: g,h<text:line-break/></text:span><text:a xlink:type="simple" xlink:href="https://www.w3resource.com/python-exercises/list/python-data-type-list-exercise-42.php" office:target-frame-name="_blank" xlink:show="new" text:style-name="Internet_20_link" text:visited-style-name="Visited_20_Internet_20_Link">Click me to see the sample solution</text:a></text:p>
      <text:p text:style-name="P5"><text:span text:style-name="Strong_20_Emphasis"><text:span text:style-name="T1">4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plit a list into different variables.<text:line-break/></text:span><text:a xlink:type="simple" xlink:href="https://www.w3resource.com/python-exercises/list/python-data-type-list-exercise-43.php" office:target-frame-name="_blank" xlink:show="new" text:style-name="Internet_20_link" text:visited-style-name="Visited_20_Internet_20_Link">Click me to see the sample solution</text:a></text:p>
      <text:p text:style-name="P4"><text:span text:style-name="Strong_20_Emphasis"><text:span text:style-name="T1">44.</text:span></text:span><text:span text:style-name="T1"> Write a Python program to generate groups of five consecutive numbers in a list.<text:line-break/></text:span><text:a xlink:type="simple" xlink:href="https://www.w3resource.com/python-exercises/list/python-data-type-list-exercise-44.php" office:target-frame-name="_blank" xlink:show="new" text:style-name="Internet_20_link" text:visited-style-name="Visited_20_Internet_20_Link">Click me to see the sample solution</text:a></text:p>
      <text:p text:style-name="P4"><text:span text:style-name="Strong_20_Emphasis"><text:span text:style-name="T1">45.</text:span></text:span><text:span text:style-name="T1"> Write a Python program to convert a pair of values into a sorted unique array.<text:line-break/></text:span><text:a xlink:type="simple" xlink:href="https://www.w3resource.com/python-exercises/list/python-data-type-list-exercise-45.php" office:target-frame-name="_blank" xlink:show="new" text:style-name="Internet_20_link" text:visited-style-name="Visited_20_Internet_20_Link">Click me to see the sample solution</text:a></text:p>
      <text:p text:style-name="P4"><text:span text:style-name="Strong_20_Emphasis"><text:span text:style-name="T1">46.</text:span></text:span><text:span text:style-name="T1"> Write a Python program to select the odd items from a list.<text:line-break/></text:span><text:a xlink:type="simple" xlink:href="https://www.w3resource.com/python-exercises/list/python-data-type-list-exercise-46.php" office:target-frame-name="_blank" xlink:show="new" text:style-name="Internet_20_link" text:visited-style-name="Visited_20_Internet_20_Link">Click me to see the sample solution</text:a></text:p>
      <text:p text:style-name="P4"><text:span text:style-name="Strong_20_Emphasis"><text:span text:style-name="T1">47.</text:span></text:span><text:span text:style-name="T1"> Write a Python program to insert an element before each element of a list.<text:line-break/></text:span><text:a xlink:type="simple" xlink:href="https://www.w3resource.com/python-exercises/list/python-data-type-list-exercise-47.php" office:target-frame-name="_blank" xlink:show="new" text:style-name="Internet_20_link" text:visited-style-name="Visited_20_Internet_20_Link">Click me to see the sample solution</text:a></text:p>
      <text:p text:style-name="P5"><text:span text:style-name="Strong_20_Emphasis"><text:span text:style-name="T1">4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print nested lists (each list on a new line) using the print() function.<text:line-break/></text:span><text:a xlink:type="simple" xlink:href="https://www.w3resource.com/python-exercises/list/python-data-type-list-exercise-48.php" office:target-frame-name="_blank" xlink:show="new" text:style-name="Internet_20_link" text:visited-style-name="Visited_20_Internet_20_Link">Click me to see the sample solution</text:a></text:p>
      <text:p text:style-name="P4"><text:span text:style-name="Strong_20_Emphasis"><text:span text:style-name="T1">49.</text:span></text:span><text:span text:style-name="T1"> Write a Python program to convert a list to a list of dictionaries.<text:line-break/>Sample lists: ["Black", "Red", "Maroon", "Yellow"], ["#000000", "#FF0000", "#800000", "#FFFF00"]<text:line-break/>Expected Output: [{'color_name': 'Black', 'color_code': '#000000'}, {'color_name': 'Red', 'color_code': '#FF0000'}, {'color_name': 'Maroon', 'color_code': '#800000'}, {'color_name': 'Yellow', 'color_code': '#FFFF00'}]<text:line-break/></text:span><text:a xlink:type="simple" xlink:href="https://www.w3resource.com/python-exercises/list/python-data-type-list-exercise-49.php" office:target-frame-name="_blank" xlink:show="new" text:style-name="Internet_20_link" text:visited-style-name="Visited_20_Internet_20_Link">Click me to see the sample solution</text:a></text:p>
      <text:p text:style-name="P5"><text:span text:style-name="Strong_20_Emphasis"><text:span text:style-name="T1">5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ort a list of nested dictionaries.<text:line-break/></text:span><text:a xlink:type="simple" xlink:href="https://www.w3resource.com/python-exercises/list/python-data-type-list-exercise-50.php" office:target-frame-name="_blank" xlink:show="new" text:style-name="Internet_20_link" text:visited-style-name="Visited_20_Internet_20_Link">Click me to see the sample solution</text:a></text:p>
      <text:p text:style-name="P4"><text:span text:style-name="Strong_20_Emphasis"><text:span text:style-name="T1">51.</text:span></text:span><text:span text:style-name="T1"> Write a Python program to split a list every Nth element.<text:line-break/>Sample list: ['a', 'b', 'c', 'd', 'e', 'f', 'g', 'h', 'i', 'j', 'k', 'l', 'm', 'n']<text:line-break/>Expected Output: [['a', 'd', 'g', 'j', 'm'], ['b', 'e', 'h', 'k', 'n'], ['c', 'f', 'i', 'l']]<text:line-break/></text:span><text:a xlink:type="simple" xlink:href="https://www.w3resource.com/python-exercises/list/python-data-type-list-exercise-51.php" office:target-frame-name="_blank" xlink:show="new" text:style-name="Internet_20_link" text:visited-style-name="Visited_20_Internet_20_Link">Click me to see the sample solution</text:a></text:p>
      <text:p text:style-name="P5"><text:span text:style-name="Strong_20_Emphasis"><text:span text:style-name="T1">5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mpute the difference between two lists.<text:line-break/>Sample data: ["red", "orange", "green", "blue", "white"], ["black", "yellow", "green", "blue"]<text:line-break/>Expected Output:<text:line-break/></text:span><text:soft-page-break/><text:span text:style-name="T1">Color1-Color2: ['white', 'orange', 'red']<text:line-break/>Color2-Color1: ['black', 'yellow']<text:line-break/></text:span><text:a xlink:type="simple" xlink:href="https://www.w3resource.com/python-exercises/list/python-data-type-list-exercise-52.php" office:target-frame-name="_blank" xlink:show="new" text:style-name="Internet_20_link" text:visited-style-name="Visited_20_Internet_20_Link">Click me to see the sample solution</text:a></text:p>
      <text:p text:style-name="P4"><text:span text:style-name="Strong_20_Emphasis"><text:span text:style-name="T1">53.</text:span></text:span><text:span text:style-name="T1"> Write a Python program to create a list with infinite elements.<text:line-break/></text:span><text:a xlink:type="simple" xlink:href="https://www.w3resource.com/python-exercises/list/python-data-type-list-exercise-53.php" office:target-frame-name="_blank" xlink:show="new" text:style-name="Internet_20_link" text:visited-style-name="Visited_20_Internet_20_Link">Click me to see the sample solution</text:a></text:p>
      <text:p text:style-name="P5"><text:span text:style-name="Strong_20_Emphasis"><text:span text:style-name="T1">5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ncatenate elements of a list.<text:line-break/></text:span><text:a xlink:type="simple" xlink:href="https://www.w3resource.com/python-exercises/list/python-data-type-list-exercise-54.php" office:target-frame-name="_blank" xlink:show="new" text:style-name="Internet_20_link" text:visited-style-name="Visited_20_Internet_20_Link">Click me to see the sample solution</text:a></text:p>
      <text:p text:style-name="P4"><text:span text:style-name="Strong_20_Emphasis"><text:span text:style-name="T1">55.</text:span></text:span><text:span text:style-name="T1"> Write a Python program to remove key-value pairs from a list of dictionaries.<text:line-break/></text:span><text:a xlink:type="simple" xlink:href="https://www.w3resource.com/python-exercises/list/python-data-type-list-exercise-55.php" office:target-frame-name="_blank" xlink:show="new" text:style-name="Internet_20_link" text:visited-style-name="Visited_20_Internet_20_Link">Click me to see the sample solution</text:a></text:p>
      <text:p text:style-name="P4"><text:span text:style-name="Strong_20_Emphasis"><text:span text:style-name="T1">56.</text:span></text:span><text:span text:style-name="T1"> Write a Python program to convert a string to a list.<text:line-break/></text:span><text:a xlink:type="simple" xlink:href="https://www.w3resource.com/python-exercises/list/python-data-type-list-exercise-56.php" office:target-frame-name="_blank" xlink:show="new" text:style-name="Internet_20_link" text:visited-style-name="Visited_20_Internet_20_Link">Click me to see the sample solution</text:a></text:p>
      <text:p text:style-name="P4"><text:span text:style-name="Strong_20_Emphasis"><text:span text:style-name="T1">57.</text:span></text:span><text:span text:style-name="T1"> Write a Python program to check if all items in a given list of strings are equal to a given string.<text:line-break/></text:span><text:a xlink:type="simple" xlink:href="https://www.w3resource.com/python-exercises/list/python-data-type-list-exercise-57.php" office:target-frame-name="_blank" xlink:show="new" text:style-name="Internet_20_link" text:visited-style-name="Visited_20_Internet_20_Link">Click me to see the sample solution</text:a></text:p>
      <text:p text:style-name="P5"><text:span text:style-name="Strong_20_Emphasis"><text:span text:style-name="T1">5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place the last element in a list with another list.<text:line-break/>Sample data : [1, 3, 5, 7, 9, 10], [2, 4, 6, 8]<text:line-break/>Expected Output: [1, 3, 5, 7, 9, 2, 4, 6, 8]<text:line-break/></text:span><text:a xlink:type="simple" xlink:href="https://www.w3resource.com/python-exercises/list/python-data-type-list-exercise-58.php" office:target-frame-name="_blank" xlink:show="new" text:style-name="Internet_20_link" text:visited-style-name="Visited_20_Internet_20_Link">Click me to see the sample solution</text:a></text:p>
      <text:p text:style-name="P5"><text:span text:style-name="Strong_20_Emphasis"><text:span text:style-name="T1">5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eck whether the n-th element exists in a given list.<text:line-break/></text:span><text:a xlink:type="simple" xlink:href="https://www.w3resource.com/python-exercises/list/python-data-type-list-exercise-59.php" office:target-frame-name="_blank" xlink:show="new" text:style-name="Internet_20_link" text:visited-style-name="Visited_20_Internet_20_Link">Click me to see the sample solution</text:a></text:p>
      <text:p text:style-name="P4"><text:span text:style-name="Strong_20_Emphasis"><text:span text:style-name="T1">60.</text:span></text:span><text:span text:style-name="T1"> Write a Python program to find a tuple, the smallest second index value from a list of tuples.<text:line-break/></text:span><text:a xlink:type="simple" xlink:href="https://www.w3resource.com/python-exercises/list/python-data-type-list-exercise-60.php" office:target-frame-name="_blank" xlink:show="new" text:style-name="Internet_20_link" text:visited-style-name="Visited_20_Internet_20_Link">Click me to see the sample solution</text:a></text:p>
      <text:p text:style-name="P4"><text:span text:style-name="Strong_20_Emphasis"><text:span text:style-name="T1">61.</text:span></text:span><text:span text:style-name="T1"> Write a Python program to create a list of empty dictionaries.<text:line-break/></text:span><text:a xlink:type="simple" xlink:href="https://www.w3resource.com/python-exercises/list/python-data-type-list-exercise-61.php" office:target-frame-name="_blank" xlink:show="new" text:style-name="Internet_20_link" text:visited-style-name="Visited_20_Internet_20_Link">Click me to see the sample solution</text:a></text:p>
      <text:p text:style-name="P4"><text:span text:style-name="Strong_20_Emphasis"><text:span text:style-name="T1">62.</text:span></text:span><text:span text:style-name="T1"> Write a Python program to print a list of space-separated elements.<text:line-break/></text:span><text:a xlink:type="simple" xlink:href="https://www.w3resource.com/python-exercises/list/python-data-type-list-exercise-62.php" office:target-frame-name="_blank" xlink:show="new" text:style-name="Internet_20_link" text:visited-style-name="Visited_20_Internet_20_Link">Click me to see the sample solution</text:a></text:p>
      <text:p text:style-name="P5"><text:span text:style-name="Strong_20_Emphasis"><text:span text:style-name="T1">6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insert a given string at the beginning of all items in a list.<text:line-break/>Sample list : [1,2,3,4], string : emp<text:line-break/>Expected output : ['emp1', 'emp2', 'emp3', 'emp4']<text:line-break/></text:span><text:a xlink:type="simple" xlink:href="https://www.w3resource.com/python-exercises/list/python-data-type-list-exercise-63.php" office:target-frame-name="_blank" xlink:show="new" text:style-name="Internet_20_link" text:visited-style-name="Visited_20_Internet_20_Link">Click me to see the sample solution</text:a></text:p>
      <text:p text:style-name="P4"><text:span text:style-name="Strong_20_Emphasis"><text:span text:style-name="T1">64.</text:span></text:span><text:span text:style-name="T1"> Write a Python program to iterate over two lists simultaneously.<text:line-break/></text:span><text:a xlink:type="simple" xlink:href="https://www.w3resource.com/python-exercises/list/python-data-type-list-exercise-64.php" office:target-frame-name="_blank" xlink:show="new" text:style-name="Internet_20_link" text:visited-style-name="Visited_20_Internet_20_Link">Click me to see the sample solution</text:a></text:p>
      <text:p text:style-name="P5"><text:soft-page-break/><text:span text:style-name="Strong_20_Emphasis"><text:span text:style-name="T1">6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move all zero digits to the end of a given list of numbers.<text:line-break/>Expected output:<text:line-break/>Original list:<text:line-break/>[3, 4, 0, 0, 0, 6, 2, 0, 6, 7, 6, 0, 0, 0, 9, 10, 7, 4, 4, 5, 3, 0, 0, 2, 9, 7, 1]<text:line-break/>Move all zero digits to end of the said list of numbers:<text:line-break/>[3, 4, 6, 2, 6, 7, 6, 9, 10, 7, 4, 4, 5, 3, 2, 9, 7, 1, 0, 0, 0, 0, 0, 0, 0, 0, 0]<text:line-break/></text:span><text:a xlink:type="simple" xlink:href="https://www.w3resource.com/python-exercises/list/python-data-type-list-exercise-65l.php" office:target-frame-name="_blank" xlink:show="new" text:style-name="Internet_20_link" text:visited-style-name="Visited_20_Internet_20_Link">Click me to see the sample solution</text:a></text:p>
      <text:p text:style-name="P5"><text:span text:style-name="Strong_20_Emphasis"><text:span text:style-name="T1">6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list in a list of lists whose sum of elements is the highest.<text:line-break/>Sample lists: [1,2,3], [4,5,6], [10,11,12], [7,8,9]<text:line-break/>Expected Output: [10, 11, 12]<text:line-break/></text:span><text:a xlink:type="simple" xlink:href="https://www.w3resource.com/python-exercises/list/python-data-type-list-exercise-66.php" office:target-frame-name="_blank" xlink:show="new" text:style-name="Internet_20_link" text:visited-style-name="Visited_20_Internet_20_Link">Click me to see the sample solution</text:a></text:p>
      <text:p text:style-name="P5"><text:span text:style-name="Strong_20_Emphasis"><text:span text:style-name="T1">6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all the values in a list that are greater than a specified number.<text:line-break/></text:span><text:a xlink:type="simple" xlink:href="https://www.w3resource.com/python-exercises/list/python-data-type-list-exercise-67.php" office:target-frame-name="_blank" xlink:show="new" text:style-name="Internet_20_link" text:visited-style-name="Visited_20_Internet_20_Link">Click me to see the sample solution</text:a></text:p>
      <text:p text:style-name="P4"><text:span text:style-name="Strong_20_Emphasis"><text:span text:style-name="T1">68.</text:span></text:span><text:span text:style-name="T1"> Write a Python program to extend a list without appending.<text:line-break/>Sample data: [10, 20, 30]<text:line-break/>[40, 50, 60]<text:line-break/>Expected output : [40, 50, 60, 10, 20, 30]<text:line-break/></text:span><text:a xlink:type="simple" xlink:href="https://www.w3resource.com/python-exercises/list/python-data-type-list-exercise-68.php" office:target-frame-name="_blank" xlink:show="new" text:style-name="Internet_20_link" text:visited-style-name="Visited_20_Internet_20_Link">Click me to see the sample solution</text:a></text:p>
      <text:p text:style-name="P4"><text:span text:style-name="Strong_20_Emphasis"><text:span text:style-name="T1">69.</text:span></text:span><text:span text:style-name="T1"> Write a Python program to remove duplicates from a list of lists.<text:line-break/>Sample list : [[10, 20], [40], [30, 56, 25], [10, 20], [33], [40]]<text:line-break/>New List : [[10, 20], [30, 56, 25], [33], [40]]<text:line-break/></text:span><text:a xlink:type="simple" xlink:href="https://www.w3resource.com/python-exercises/list/python-data-type-list-exercise-69.php" office:target-frame-name="_blank" xlink:show="new" text:style-name="Internet_20_link" text:visited-style-name="Visited_20_Internet_20_Link">Click me to see the sample solution</text:a></text:p>
      <text:p text:style-name="P5"><text:span text:style-name="Strong_20_Emphasis"><text:span text:style-name="T1">70. </text:span></text:span><text:span text:style-name="T1">Write a </text:span><text:a xlink:type="simple" xlink:href="https://www.w3resource.com/python-exercises/list/#" text:style-name="Internet_20_link" text:visited-style-name="Visited_20_Internet_20_Link"> <text:span text:style-name="T2">Python</text:span></text:a><text:span text:style-name="T1"> program to find items starting with a specific character from a list.<text:line-break/>Expected Output:<text:line-break/>Original list:<text:line-break/>['abcd', 'abc', 'bcd', 'bkie', 'cder', 'cdsw', 'sdfsd', 'dagfa', 'acjd']<text:line-break/>Items start with a from the said list:<text:line-break/>['abcd', 'abc', 'acjd']<text:line-break/>Items start with d from the said list:<text:line-break/>['dagfa']<text:line-break/>Items start with w from the said list:<text:line-break/>[]<text:line-break/></text:span><text:a xlink:type="simple" xlink:href="https://www.w3resource.com/python-exercises/list/python-data-type-list-exercise-70l.php" office:target-frame-name="_blank" xlink:show="new" text:style-name="Internet_20_link" text:visited-style-name="Visited_20_Internet_20_Link">Click me to see the sample solution</text:a></text:p>
      <text:p text:style-name="P5"><text:soft-page-break/><text:span text:style-name="Strong_20_Emphasis"><text:span text:style-name="T1">7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eck whether all dictionaries in a list are empty or not.<text:line-break/>Sample list : [{},{},{}]<text:line-break/>Return value : True<text:line-break/>Sample list : [{1,2},{},{}]<text:line-break/>Return value : False<text:line-break/></text:span><text:a xlink:type="simple" xlink:href="https://www.w3resource.com/python-exercises/list/python-data-type-list-exercise-71.php" office:target-frame-name="_blank" xlink:show="new" text:style-name="Internet_20_link" text:visited-style-name="Visited_20_Internet_20_Link">Click me to see the sample solution</text:a></text:p>
      <text:p text:style-name="P4"><text:span text:style-name="Strong_20_Emphasis"><text:span text:style-name="T1">72.</text:span></text:span><text:span text:style-name="T1"> Write a Python program to flatten a given nested list structure.<text:line-break/>Original list: [0, 10, [20, 30], 40, 50, [60, 70, 80], [90, 100, 110, 120]]<text:line-break/>Flatten list:<text:line-break/>[0, 10, 20, 30, 40, 50, 60, 70, 80, 90, 100, 110, 120]<text:line-break/></text:span><text:a xlink:type="simple" xlink:href="https://www.w3resource.com/python-exercises/list/python-data-type-list-exercise-72.php" office:target-frame-name="_blank" xlink:show="new" text:style-name="Internet_20_link" text:visited-style-name="Visited_20_Internet_20_Link">Click me to see the sample solution</text:a></text:p>
      <text:p text:style-name="P5"><text:span text:style-name="Strong_20_Emphasis"><text:span text:style-name="T1">7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move consecutive (following each other continuously) duplicates (elements) from a given list.<text:line-break/>Original list:<text:line-break/>[0, 0, 1, 2, 3, 4, 4, 5, 6, 6, 6, 7, 8, 9, 4, 4]<text:line-break/>After removing consecutive duplicates:<text:line-break/>[0, 1, 2, 3, 4, 5, 6, 7, 8, 9, 4]<text:line-break/></text:span><text:a xlink:type="simple" xlink:href="https://www.w3resource.com/python-exercises/list/python-data-type-list-exercise-73.php" office:target-frame-name="_blank" xlink:show="new" text:style-name="Internet_20_link" text:visited-style-name="Visited_20_Internet_20_Link">Click me to see the sample solution</text:a></text:p>
      <text:p text:style-name="P5"><text:span text:style-name="Strong_20_Emphasis"><text:span text:style-name="T1">7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pack consecutive duplicates of a given list of elements into sublists.<text:line-break/>Original list:<text:line-break/>[0, 0, 1, 2, 3, 4, 4, 5, 6, 6, 6, 7, 8, 9, 4, 4]<text:line-break/>After packing consecutive duplicates of the said list elements into sublists:<text:line-break/>[[0, 0], [1], [2], [3], [4, 4], [5], [6, 6, 6], [7], [8], [9], [4, 4]]<text:line-break/></text:span><text:a xlink:type="simple" xlink:href="https://www.w3resource.com/python-exercises/list/python-data-type-list-exercise-74.php" office:target-frame-name="_blank" xlink:show="new" text:style-name="Internet_20_link" text:visited-style-name="Visited_20_Internet_20_Link">Click me to see the sample solution</text:a></text:p>
      <text:p text:style-name="P5"><text:span text:style-name="Strong_20_Emphasis"><text:span text:style-name="T1">7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reate a list reflecting the run-length encoding from a given list of integers or a given list of characters.<text:line-break/>Original list:<text:line-break/>[1, 1, 2, 3, 4, 4.3, 5, 1]<text:line-break/>List reflecting the run-length encoding from the said list:<text:line-break/>[[2, 1], [1, 2], [1, 3], [1, 4], [1, 4.3], [1, 5], [1, 1]]<text:line-break/>Original String:<text:line-break/>automatically<text:line-break/>List reflecting the run-length encoding from the said string:<text:line-break/>[[1, 'a'], [1, 'u'], [1, 't'], [1, 'o'], [1, 'm'], [1, 'a'], [1, 't'], [1, 'i'], [1, 'c'], [1, 'a'], [2, 'l'], [1, 'y']]<text:line-break/></text:span><text:a xlink:type="simple" xlink:href="https://www.w3resource.com/python-exercises/list/python-data-type-list-exercise-75.php" office:target-frame-name="_blank" xlink:show="new" text:style-name="Internet_20_link" text:visited-style-name="Visited_20_Internet_20_Link">Click me to see the sample solution</text:a></text:p>
      <text:p text:style-name="P5"><text:soft-page-break/><text:span text:style-name="Strong_20_Emphasis"><text:span text:style-name="T1">7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reate a list reflecting the modified run-length encoding from a given list of integers or a given list of characters.<text:line-break/>Original list:<text:line-break/>[1, 1, 2, 3, 4, 4, 5, 1]<text:line-break/>List reflecting the modified run-length encoding from the said list:<text:line-break/>[[2, 1], 2, 3, [2, 4], 5, 1]<text:line-break/>Original String:<text:line-break/>aabcddddadnss<text:line-break/>List reflecting the modified run-length encoding from the said string:<text:line-break/>[[2, 'a'], 'b', 'c', [4, 'd'], 'a', 'd', 'n', [2, 's']]<text:line-break/></text:span><text:a xlink:type="simple" xlink:href="https://www.w3resource.com/python-exercises/list/python-data-type-list-exercise-76.php" office:target-frame-name="_blank" xlink:show="new" text:style-name="Internet_20_link" text:visited-style-name="Visited_20_Internet_20_Link">Click me to see the sample solution</text:a></text:p>
      <text:p text:style-name="P5"><text:span text:style-name="Strong_20_Emphasis"><text:span text:style-name="T1">7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decode a run-length message.<text:line-break/>Original encoded list:<text:line-break/>[[2, 1], 2, 3, [2, 4], 5, 1]<text:line-break/>Decode a run-length encoded said list:<text:line-break/>[1, 1, 2, 3, 4, 4, 5, 1]<text:line-break/></text:span><text:a xlink:type="simple" xlink:href="https://www.w3resource.com/python-exercises/list/python-data-type-list-exercise-77.php" office:target-frame-name="_blank" xlink:show="new" text:style-name="Internet_20_link" text:visited-style-name="Visited_20_Internet_20_Link">Click me to see the sample solution</text:a></text:p>
      <text:p text:style-name="P5"><text:span text:style-name="Strong_20_Emphasis"><text:span text:style-name="T1">7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plit a given list into two parts where the length of the first part of the list is given.<text:line-break/>Original list:<text:line-break/>[1, 1, 2, 3, 4, 4, 5, 1]<text:line-break/>Length of the first part of the list: 3<text:line-break/>Splited the said list into two parts:<text:line-break/>([1, 1, 2], [3, 4, 4, 5, 1])<text:line-break/></text:span><text:a xlink:type="simple" xlink:href="https://www.w3resource.com/python-exercises/list/python-data-type-list-exercise-78.php" office:target-frame-name="_blank" xlink:show="new" text:style-name="Internet_20_link" text:visited-style-name="Visited_20_Internet_20_Link">Click me to see the sample solution</text:a></text:p>
      <text:p text:style-name="P4"><text:span text:style-name="Strong_20_Emphasis"><text:span text:style-name="T1">79.</text:span></text:span><text:span text:style-name="T1"> Write a Python program to remove the K'th element from a given list, and print the updated list.<text:line-break/>Original list:<text:line-break/>[1, 1, 2, 3, 4, 4, 5, 1]<text:line-break/>After removing an element at the kth position of the said list:<text:line-break/>[1, 1, 3, 4, 4, 5, 1]<text:line-break/></text:span><text:a xlink:type="simple" xlink:href="https://www.w3resource.com/python-exercises/list/python-data-type-list-exercise-79.php" office:target-frame-name="_blank" xlink:show="new" text:style-name="Internet_20_link" text:visited-style-name="Visited_20_Internet_20_Link">Click me to see the sample solution</text:a></text:p>
      <text:p text:style-name="P5"><text:span text:style-name="Strong_20_Emphasis"><text:span text:style-name="T1">8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insert an element at a specified position into a given list.<text:line-break/>Original list:<text:line-break/>[1, 1, 2, 3, 4, 4, 5, 1]<text:line-break/>After inserting an element at kth position in the said list:<text:line-break/></text:span><text:soft-page-break/><text:span text:style-name="T1">[1, 1, 12, 2, 3, 4, 4, 5, 1]<text:line-break/></text:span><text:a xlink:type="simple" xlink:href="https://www.w3resource.com/python-exercises/list/python-data-type-list-exercise-80.php" office:target-frame-name="_blank" xlink:show="new" text:style-name="Internet_20_link" text:visited-style-name="Visited_20_Internet_20_Link">Click me to see the sample solution</text:a></text:p>
      <text:p text:style-name="P5"><text:span text:style-name="Strong_20_Emphasis"><text:span text:style-name="T1">8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extract a given number of randomly selected elements from a given list.<text:line-break/>Original list:<text:line-break/>[1, 1, 2, 3, 4, 4, 5, 1]<text:line-break/>Selected 3 random numbers of the above list:<text:line-break/>[4, 4, 1]<text:line-break/></text:span><text:a xlink:type="simple" xlink:href="https://www.w3resource.com/python-exercises/list/python-data-type-list-exercise-81.php" office:target-frame-name="_blank" xlink:show="new" text:style-name="Internet_20_link" text:visited-style-name="Visited_20_Internet_20_Link">Click me to see the sample solution</text:a></text:p>
      <text:p text:style-name="P4"><text:span text:style-name="Strong_20_Emphasis"><text:span text:style-name="T1">82.</text:span></text:span><text:span text:style-name="T1"> Write a Python program to generate combinations of n distinct objects taken from the elements of a given list.<text:line-break/>Original list: [1, 2, 3, 4, 5, 6, 7, 8, 9] Combinations of 2 distinct objects: [1, 2] [1, 3] [1, 4] [1, 5] .... [7, 8] [7, 9] [8, 9]<text:line-break/></text:span><text:a xlink:type="simple" xlink:href="https://www.w3resource.com/python-exercises/list/python-data-type-list-exercise-82.php" office:target-frame-name="_blank" xlink:show="new" text:style-name="Internet_20_link" text:visited-style-name="Visited_20_Internet_20_Link">Click me to see the sample solution</text:a></text:p>
      <text:p text:style-name="P5"><text:span text:style-name="Strong_20_Emphasis"><text:span text:style-name="T1">8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ound every number in a given list of numbers and print the total sum multiplied by the length of the list.<text:line-break/>Original list: [22.4, 4.0, -16.22, -9.1, 11.0, -12.22, 14.2, -5.2, 17.5]<text:line-break/>Result:<text:line-break/>243<text:line-break/></text:span><text:a xlink:type="simple" xlink:href="https://www.w3resource.com/python-exercises/list/python-data-type-list-exercise-83.php" office:target-frame-name="_blank" xlink:show="new" text:style-name="Internet_20_link" text:visited-style-name="Visited_20_Internet_20_Link">Click me to see the sample solution</text:a></text:p>
      <text:p text:style-name="P5"><text:span text:style-name="Strong_20_Emphasis"><text:span text:style-name="T1">8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ound the numbers in a given list, print the minimum and maximum numbers and multiply the numbers by 5. Print the unique numbers in ascending order separated by space.<text:line-break/>Original list: [22.4, 4.0, 16.22, 9.1, 11.0, 12.22, 14.2, 5.2, 17.5]<text:line-break/>Minimum value: 4<text:line-break/>Maximum value: 22<text:line-break/>Result:<text:line-break/>20 25 45 55 60 70 80 90 110<text:line-break/></text:span><text:a xlink:type="simple" xlink:href="https://www.w3resource.com/python-exercises/list/python-data-type-list-exercise-84.php" office:target-frame-name="_blank" xlink:show="new" text:style-name="Internet_20_link" text:visited-style-name="Visited_20_Internet_20_Link">Click me to see the sample solution</text:a></text:p>
      <text:p text:style-name="P5"><text:span text:style-name="Strong_20_Emphasis"><text:span text:style-name="T1">8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reate a multidimensional list (lists of lists) with zeros.<text:line-break/>Multidimensional list: [[0, 0], [0, 0], [0, 0]]<text:line-break/></text:span><text:a xlink:type="simple" xlink:href="https://www.w3resource.com/python-exercises/list/python-data-type-list-exercise-85.php" office:target-frame-name="_blank" xlink:show="new" text:style-name="Internet_20_link" text:visited-style-name="Visited_20_Internet_20_Link">Click me to see the sample solution</text:a></text:p>
      <text:p text:style-name="P4"><text:span text:style-name="Strong_20_Emphasis"><text:span text:style-name="T1">86.</text:span></text:span><text:span text:style-name="T1"> Write a Python program to create a 3X3 grid with numbers.<text:line-break/>3X3 grid with numbers:<text:line-break/>[[1, 2, 3], [1, 2, 3], [1, 2, 3]]<text:line-break/></text:span><text:a xlink:type="simple" xlink:href="https://www.w3resource.com/python-exercises/list/python-data-type-list-exercise-86.php" office:target-frame-name="_blank" xlink:show="new" text:style-name="Internet_20_link" text:visited-style-name="Visited_20_Internet_20_Link">Click me to see the sample solution</text:a></text:p>
      <text:p text:style-name="P5"><text:soft-page-break/><text:span text:style-name="Strong_20_Emphasis"><text:span text:style-name="T1">8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ad a matrix from the console and print the sum for each column. As input from the user, accept matrix rows, columns, and elements separated by a space (each row).<text:line-break/>Input rows: 2<text:line-break/>Input columns: 2<text:line-break/>Input number of elements in a row (1, 2, 3):<text:line-break/>1 2<text:line-break/>3 4<text:line-break/>sum for each column:<text:line-break/>4 6<text:line-break/></text:span><text:a xlink:type="simple" xlink:href="https://www.w3resource.com/python-exercises/list/python-data-type-list-exercise-87.php" office:target-frame-name="_blank" xlink:show="new" text:style-name="Internet_20_link" text:visited-style-name="Visited_20_Internet_20_Link">Click me to see the sample solution</text:a></text:p>
      <text:p text:style-name="P5"><text:span text:style-name="Strong_20_Emphasis"><text:span text:style-name="T1">8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ad a square matrix from the console and print the sum of the matrix's primary diagonal. Accept the size of the square matrix and elements for each column separated with a space (for every row) as input from the user.<text:line-break/>Input the size of the matrix: 3<text:line-break/>2 3 4<text:line-break/>4 5 6<text:line-break/>3 4 7<text:line-break/>Sum of matrix primary diagonal:<text:line-break/>14<text:line-break/></text:span><text:a xlink:type="simple" xlink:href="https://www.w3resource.com/python-exercises/list/python-data-type-list-exercise-88.php" office:target-frame-name="_blank" xlink:show="new" text:style-name="Internet_20_link" text:visited-style-name="Visited_20_Internet_20_Link">Click me to see the sample solution</text:a></text:p>
      <text:p text:style-name="P5"><text:span text:style-name="Strong_20_Emphasis"><text:span text:style-name="T1">8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Zip two given lists of lists.<text:line-break/>Original lists:<text:line-break/>[[1, 3], [5, 7], [9, 11]]<text:line-break/>[[2, 4], [6, 8], [10, 12, 14]]<text:line-break/>Zipped list:<text:line-break/>[[1, 3, 2, 4], [5, 7, 6, 8], [9, 11, 10, 12, 14]]<text:line-break/></text:span><text:a xlink:type="simple" xlink:href="https://www.w3resource.com/python-exercises/list/python-data-type-list-exercise-89.php" office:target-frame-name="_blank" xlink:show="new" text:style-name="Internet_20_link" text:visited-style-name="Visited_20_Internet_20_Link">Click me to see the sample solution</text:a></text:p>
      <text:p text:style-name="P5"><text:span text:style-name="Strong_20_Emphasis"><text:span text:style-name="T1">9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unt the number of lists in a given list of lists.<text:line-break/>Original list:<text:line-break/>[[1, 3], [5, 7], [9, 11], [13, 15, 17]]<text:line-break/>Number of lists in said list of lists:<text:line-break/>4<text:line-break/>Original list:<text:line-break/>[[2, 4], [[6, 8], [4, 5, 8]], [10, 12, 14]]<text:line-break/>Number of lists in said list of lists:<text:line-break/></text:span><text:soft-page-break/><text:span text:style-name="T1">3<text:line-break/></text:span><text:a xlink:type="simple" xlink:href="https://www.w3resource.com/python-exercises/list/python-data-type-list-exercise-90.php" office:target-frame-name="_blank" xlink:show="new" text:style-name="Internet_20_link" text:visited-style-name="Visited_20_Internet_20_Link">Click me to see the sample solution</text:a></text:p>
      <text:p text:style-name="P5"><text:span text:style-name="Strong_20_Emphasis"><text:span text:style-name="T1">9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a list with maximum and minimum lengths.<text:line-break/>Original list:<text:line-break/>[[0], [1, 3], [5, 7], [9, 11], [13, 15, 17]]<text:line-break/>List with maximum length of lists:<text:line-break/>(3, [13, 15, 17])<text:line-break/>List with minimum length of lists:<text:line-break/>(1, [0])<text:line-break/>Original list:<text:line-break/>[[0], [1, 3], [5, 7], [9, 11], [3, 5, 7]]<text:line-break/>List with maximum length of lists:<text:line-break/>(3, [3, 5, 7])<text:line-break/>List with minimum length of lists:<text:line-break/>(1, [0])<text:line-break/>Original list:<text:line-break/>[[12], [1, 3], [1, 34, 5, 7], [9, 11], [3, 5, 7]]<text:line-break/>List with maximum length of lists:<text:line-break/>(4, [1, 34, 5, 7])<text:line-break/>List with minimum length of lists:<text:line-break/>(1, [12])<text:line-break/></text:span><text:a xlink:type="simple" xlink:href="https://www.w3resource.com/python-exercises/list/python-data-type-list-exercise-91.php" office:target-frame-name="_blank" xlink:show="new" text:style-name="Internet_20_link" text:visited-style-name="Visited_20_Internet_20_Link">Click me to see the sample solution</text:a></text:p>
      <text:p text:style-name="P5"><text:span text:style-name="Strong_20_Emphasis"><text:span text:style-name="T1">9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eck if a nested list is a subset of another nested list.<text:line-break/>Original list:<text:line-break/>[[1, 3], [5, 7], [9, 11], [13, 15, 17]]<text:line-break/>[[1, 3], [13, 15, 17]]<text:line-break/>If the one of the said list is a subset of another.:<text:line-break/>True<text:line-break/>Original list:<text:line-break/>[[[1, 2], [2, 3]], [[3, 4], [5, 6]]]<text:line-break/>[[[3, 4], [5, 6]]]<text:line-break/>If the one of the said list is a subset of another.:<text:line-break/>True<text:line-break/>Original list:<text:line-break/>[[[1, 2], [2, 3]], [[3, 4], [5, 7]]]<text:line-break/>[[[3, 4], [5, 6]]]<text:line-break/>If the one of the said list is a subset of another.:<text:line-break/></text:span><text:soft-page-break/><text:span text:style-name="T1">False<text:line-break/></text:span><text:a xlink:type="simple" xlink:href="https://www.w3resource.com/python-exercises/list/python-data-type-list-exercise-92.php" office:target-frame-name="_blank" xlink:show="new" text:style-name="Internet_20_link" text:visited-style-name="Visited_20_Internet_20_Link">Click me to see the sample solution</text:a></text:p>
      <text:p text:style-name="P5"><text:span text:style-name="Strong_20_Emphasis"><text:span text:style-name="T1">9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unt the number of sublists that contain a particular element.<text:line-break/>Original list:<text:line-break/>[[1, 3], [5, 7], [1, 11], [1, 15, 7]]<text:line-break/>Count 1 in the said list:<text:line-break/>3<text:line-break/>Count 7 in the said list:<text:line-break/>2<text:line-break/>Original list:<text:line-break/>[['A', 'B'], ['A', 'C'], ['A', 'D', 'E'], ['B', 'C', 'D']]<text:line-break/>Count 'A' in the said list:<text:line-break/>3<text:line-break/>Count 'E' in the said list:<text:line-break/>1<text:line-break/></text:span><text:a xlink:type="simple" xlink:href="https://www.w3resource.com/python-exercises/list/python-data-type-list-exercise-93.php" office:target-frame-name="_blank" xlink:show="new" text:style-name="Internet_20_link" text:visited-style-name="Visited_20_Internet_20_Link">Click me to see the sample solution</text:a></text:p>
      <text:p text:style-name="P5"><text:span text:style-name="Strong_20_Emphasis"><text:span text:style-name="T1">9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unt the number of unique sublists within a given list.<text:line-break/>Original list:<text:line-break/>[[1, 3], [5, 7], [1, 3], [13, 15, 17], [5, 7], [9, 11]]<text:line-break/>Number of unique lists of the said list:<text:line-break/>{(1, 3): 2, (5, 7): 2, (13, 15, 17): 1, (9, 11): 1}<text:line-break/>Original list:<text:line-break/>[['green', 'orange'], ['black'], ['green', 'orange'], ['white']]<text:line-break/>Number of unique lists of the said list:<text:line-break/>{('green', 'orange'): 2, ('black',): 1, ('white',): 1}<text:line-break/></text:span><text:a xlink:type="simple" xlink:href="https://www.w3resource.com/python-exercises/list/python-data-type-list-exercise-94.php" office:target-frame-name="_blank" xlink:show="new" text:style-name="Internet_20_link" text:visited-style-name="Visited_20_Internet_20_Link">Click me to see the sample solution</text:a></text:p>
      <text:p text:style-name="P5"><text:span text:style-name="Strong_20_Emphasis"><text:span text:style-name="T1">9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ort each sublist of strings in a given list of lists.<text:line-break/>Original list:<text:line-break/>[[2], [0], [1, 3], [0, 7], [9, 11], [13, 15, 17]]<text:line-break/>Sort the list of lists by length and value:<text:line-break/>[[0], [2], [0, 7], [1, 3], [9, 11], [13, 15, 17]]<text:line-break/></text:span><text:a xlink:type="simple" xlink:href="https://www.w3resource.com/python-exercises/list/python-data-type-list-exercise-95.php" office:target-frame-name="_blank" xlink:show="new" text:style-name="Internet_20_link" text:visited-style-name="Visited_20_Internet_20_Link">Click me to see the sample solution</text:a></text:p>
      <text:p text:style-name="P5"><text:span text:style-name="Strong_20_Emphasis"><text:span text:style-name="T1">9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ort a given list of lists by length and value.<text:line-break/>Original list:<text:line-break/>[[2], [0], [1, 3], [0, 7], [9, 11], [13, 15, 17]]<text:line-break/>Sort the list of lists by length and value:<text:line-break/></text:span><text:soft-page-break/><text:span text:style-name="T1">[[0], [2], [0, 7], [1, 3], [9, 11], [13, 15, 17]]<text:line-break/></text:span><text:a xlink:type="simple" xlink:href="https://www.w3resource.com/python-exercises/list/python-data-type-list-exercise-96.php" office:target-frame-name="_blank" xlink:show="new" text:style-name="Internet_20_link" text:visited-style-name="Visited_20_Internet_20_Link">Click me to see the sample solution</text:a></text:p>
      <text:p text:style-name="P5"><text:span text:style-name="Strong_20_Emphasis"><text:span text:style-name="T1">9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move sublists from a given list of lists that contain an element outside a given range.<text:line-break/>Original list:<text:line-break/>[[2], [0], [1, 2, 3], [0, 1, 2, 3, 6, 7], [9, 11], [13, 14, 15, 17]]<text:line-break/>After removing sublists from a given list of lists, which contains an element outside the given range:<text:line-break/>[[13, 14, 15, 17]]<text:line-break/></text:span><text:a xlink:type="simple" xlink:href="https://www.w3resource.com/python-exercises/list/python-data-type-list-exercise-97.php" office:target-frame-name="_blank" xlink:show="new" text:style-name="Internet_20_link" text:visited-style-name="Visited_20_Internet_20_Link">Click me to see the sample solution</text:a></text:p>
      <text:p text:style-name="P5"><text:span text:style-name="Strong_20_Emphasis"><text:span text:style-name="T1">9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cramble the letters of a string in a given list.<text:line-break/>Original list:<text:line-break/>['Python', 'list', 'exercises', 'practice', 'solution']<text:line-break/>After scrambling the letters of the strings of the said list:<text:line-break/>['tnPhyo', 'tlis', 'ecrsseiex', 'ccpitear', 'noiltuos']<text:line-break/></text:span><text:a xlink:type="simple" xlink:href="https://www.w3resource.com/python-exercises/list/python-data-type-list-exercise-98.php" office:target-frame-name="_blank" xlink:show="new" text:style-name="Internet_20_link" text:visited-style-name="Visited_20_Internet_20_Link">Click me to see the sample solution</text:a></text:p>
      <text:p text:style-name="P5"><text:span text:style-name="Strong_20_Emphasis"><text:span text:style-name="T1">9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maximum and minimum values in a given heterogeneous list.<text:line-break/>Original list:<text:line-break/>['Python', 3, 2, 4, 5, 'version']<text:line-break/>Maximum and Minimum values in the said list:<text:line-break/>(5, 2)<text:line-break/></text:span><text:a xlink:type="simple" xlink:href="https://www.w3resource.com/python-exercises/list/python-data-type-list-exercise-99.php" office:target-frame-name="_blank" xlink:show="new" text:style-name="Internet_20_link" text:visited-style-name="Visited_20_Internet_20_Link">Click me to see the sample solution</text:a></text:p>
      <text:p text:style-name="P4"><text:span text:style-name="Strong_20_Emphasis"><text:span text:style-name="T1">100.</text:span></text:span><text:span text:style-name="T1"> Write a Python program to extract common index elements from more than one given list.<text:line-break/>Original lists:<text:line-break/>[1, 1, 3, 4, 5, 6, 7]<text:line-break/>[0, 1, 2, 3, 4, 5, 7]<text:line-break/>[0, 1, 2, 3, 4, 5, 7]<text:line-break/>Common index elements of the said lists:<text:line-break/>[1, 7]<text:line-break/></text:span><text:a xlink:type="simple" xlink:href="https://www.w3resource.com/python-exercises/list/python-data-type-list-exercise-100.php" office:target-frame-name="_blank" xlink:show="new" text:style-name="Internet_20_link" text:visited-style-name="Visited_20_Internet_20_Link">Click me to see the sample solution</text:a></text:p>
      <text:p text:style-name="P5"><text:span text:style-name="Strong_20_Emphasis"><text:span text:style-name="T1">10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ort a given matrix in ascending order according to the sum of its rows.<text:line-break/>Original Matrix:<text:line-break/>[[1, 2, 3], [2, 4, 5], [1, 1, 1]]<text:line-break/>Sort the said matrix in ascending order according to the sum of its rows<text:line-break/></text:span><text:soft-page-break/><text:span text:style-name="T1">[[1, 1, 1], [1, 2, 3], [2, 4, 5]]<text:line-break/>Original Matrix:<text:line-break/>[[1, 2, 3], [-2, 4, -5], [1, -1, 1]]<text:line-break/>Sort the said matrix in ascending order according to the sum of its rows<text:line-break/>[[-2, 4, -5], [1, -1, 1], [1, 2, 3]]<text:line-break/></text:span><text:a xlink:type="simple" xlink:href="https://www.w3resource.com/python-exercises/list/python-data-type-list-exercise-101.php" office:target-frame-name="_blank" xlink:show="new" text:style-name="Internet_20_link" text:visited-style-name="Visited_20_Internet_20_Link">Click me to see the sample solution</text:a></text:p>
      <text:p text:style-name="P5"><text:span text:style-name="Strong_20_Emphasis"><text:span text:style-name="T1">10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extract specified size of strings from a give list of string values.<text:line-break/>Original list:<text:line-break/>['</text:span><text:a xlink:type="simple" xlink:href="https://www.w3resource.com/python-exercises/list/#" text:style-name="Internet_20_link" text:visited-style-name="Visited_20_Internet_20_Link"> <text:span text:style-name="T2">Python</text:span></text:a><text:span text:style-name="T1">', 'list', 'exercises', 'practice', 'solution']<text:line-break/>length of the string to extract:<text:line-break/>8<text:line-break/>After extracting strings of specified length from the said list:<text:line-break/>['practice', 'solution']<text:line-break/></text:span><text:a xlink:type="simple" xlink:href="https://www.w3resource.com/python-exercises/list/python-data-type-list-exercise-102.php" office:target-frame-name="_blank" xlink:show="new" text:style-name="Internet_20_link" text:visited-style-name="Visited_20_Internet_20_Link">Click me to see the sample solution</text:a></text:p>
      <text:p text:style-name="P4"><text:span text:style-name="Strong_20_Emphasis"><text:span text:style-name="T1">103.</text:span></text:span><text:span text:style-name="T1"> Write a Python program to extract specified number of elements from a given list, which follows each other continuously.<text:line-break/>Original list:<text:line-break/>[1, 1, 3, 4, 4, 5, 6, 7]<text:line-break/>Extract 2 number of elements from the said list which follows each other continuously:<text:line-break/>[1, 4]<text:line-break/>Original lists:<text:line-break/>[0, 1, 2, 3, 4, 4, 4, 4, 5, 7]<text:line-break/>Extract 4 number of elements from the said list which follows each other continuously:<text:line-break/>[4]<text:line-break/></text:span><text:a xlink:type="simple" xlink:href="https://www.w3resource.com/python-exercises/list/python-data-type-list-exercise-103.php" office:target-frame-name="_blank" xlink:show="new" text:style-name="Internet_20_link" text:visited-style-name="Visited_20_Internet_20_Link">Click me to see the sample solution</text:a></text:p>
      <text:p text:style-name="P5"><text:span text:style-name="Strong_20_Emphasis"><text:span text:style-name="T1">10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difference between consecutive numbers in a given list.<text:line-break/>Original list:<text:line-break/>[1, 1, 3, 4, 4, 5, 6, 7]<text:line-break/>Difference between consecutive numbers of the said list:<text:line-break/>[0, 2, 1, 0, 1, 1, 1]<text:line-break/>Original list:<text:line-break/>[4, 5, 8, 9, 6, 10]<text:line-break/>Difference between consecutive numbers of the said list:<text:line-break/>[1, 3, 1, -3, 4]<text:line-break/></text:span><text:a xlink:type="simple" xlink:href="https://www.w3resource.com/python-exercises/list/python-data-type-list-exercise-104.php" office:target-frame-name="_blank" xlink:show="new" text:style-name="Internet_20_link" text:visited-style-name="Visited_20_Internet_20_Link">Click me to see the sample solution</text:a></text:p>
      <text:p text:style-name="P5"><text:soft-page-break/><text:span text:style-name="Strong_20_Emphasis"><text:span text:style-name="T1">10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mpute average of two given lists.<text:line-break/>Original list:<text:line-break/>[1, 1, 3, 4, 4, 5, 6, 7]<text:line-break/>[0, 1, 2, 3, 4, 4, 5, 7, 8]<text:line-break/>Average of two lists:<text:line-break/>3.823529411764706<text:line-break/></text:span><text:a xlink:type="simple" xlink:href="https://www.w3resource.com/python-exercises/list/python-data-type-list-exercise-105.php" office:target-frame-name="_blank" xlink:show="new" text:style-name="Internet_20_link" text:visited-style-name="Visited_20_Internet_20_Link">Click me to see the sample solution</text:a></text:p>
      <text:p text:style-name="P5"><text:span text:style-name="Strong_20_Emphasis"><text:span text:style-name="T1">10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unt integers in a given mixed list.<text:line-break/>Original list:<text:line-break/>[1, 'abcd', 3, 1.2, 4, 'xyz', 5, 'pqr', 7, -5, -12.22]<text:line-break/>Number of integers in the said mixed list:<text:line-break/>6<text:line-break/></text:span><text:a xlink:type="simple" xlink:href="https://www.w3resource.com/python-exercises/list/python-data-type-list-exercise-106.php" office:target-frame-name="_blank" xlink:show="new" text:style-name="Internet_20_link" text:visited-style-name="Visited_20_Internet_20_Link">Click me to see the sample solution</text:a></text:p>
      <text:p text:style-name="P4"><text:span text:style-name="Strong_20_Emphasis"><text:span text:style-name="T1">107.</text:span></text:span><text:span text:style-name="T1"> Write a Python program to remove a specified column from a given nested list.<text:line-break/>Original Nested list:<text:line-break/>[[1, 2, 3], [2, 4, 5], [1, 1, 1]]<text:line-break/>After removing 1st column:<text:line-break/>[[2, 3], [4, 5], [1, 1]]<text:line-break/>Original Nested list:<text:line-break/>[[1, 2, 3], [-2, 4, -5], [1, -1, 1]]<text:line-break/>After removing 3rd column:<text:line-break/>[[1, 2], [-2, 4], [1, -1]]<text:line-break/></text:span><text:a xlink:type="simple" xlink:href="https://www.w3resource.com/python-exercises/list/python-data-type-list-exercise-107.php" office:target-frame-name="_blank" xlink:show="new" text:style-name="Internet_20_link" text:visited-style-name="Visited_20_Internet_20_Link">Click me to see the sample solution</text:a></text:p>
      <text:p text:style-name="P5"><text:span text:style-name="Strong_20_Emphasis"><text:span text:style-name="T1">10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extract a specified column from a given nested list.<text:line-break/>Original Nested list:<text:line-break/>[[1, 2, 3], [2, 4, 5], [1, 1, 1]]<text:line-break/>Extract 1st column:<text:line-break/>[1, 2, 1]<text:line-break/>Original Nested list:<text:line-break/>[[1, 2, 3], [-2, 4, -5], [1, -1, 1]]<text:line-break/>Extract 3rd column:<text:line-break/>[3, -5, 1]<text:line-break/></text:span><text:a xlink:type="simple" xlink:href="https://www.w3resource.com/python-exercises/list/python-data-type-list-exercise-108.php" office:target-frame-name="_blank" xlink:show="new" text:style-name="Internet_20_link" text:visited-style-name="Visited_20_Internet_20_Link">Click me to see the sample solution</text:a></text:p>
      <text:p text:style-name="P5"><text:span text:style-name="Strong_20_Emphasis"><text:span text:style-name="T1">10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otate a given list by a specified number of items in the right or left direction.<text:line-break/>original List:<text:line-break/>[1, 2, 3, 4, 5, 6, 7, 8, 9, 10]<text:line-break/></text:span><text:soft-page-break/><text:span text:style-name="T1">Rotate the said list in left direction by 4:<text:line-break/>[4, 5, 6, 7, 8, 9, 10, 1, 2, 3, 4]<text:line-break/>Rotate the said list in left direction by 2:<text:line-break/>[3, 4, 5, 6, 7, 8, 9, 10, 1, 2]<text:line-break/>Rotate the said list in Right direction by 4:<text:line-break/>[8, 9, 10, 1, 2, 3, 4, 5, 6]<text:line-break/>Rotate the said list in Right direction by 2:<text:line-break/>[9, 10, 1, 2, 3, 4, 5, 6, 7, 8]<text:line-break/></text:span><text:a xlink:type="simple" xlink:href="https://www.w3resource.com/python-exercises/list/python-data-type-list-exercise-109.php" office:target-frame-name="_blank" xlink:show="new" text:style-name="Internet_20_link" text:visited-style-name="Visited_20_Internet_20_Link">Click me to see the sample solution</text:a></text:p>
      <text:p text:style-name="P5"><text:span text:style-name="Strong_20_Emphasis"><text:span text:style-name="T1">11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item with the most occurrences in a given list.<text:line-break/>Original list:<text:line-break/>[2, 3, 8, 4, 7, 9, 8, 2, 6, 5, 1, 6, 1, 2, 3, 4, 6, 9, 1, 2]<text:line-break/>Item with maximum occurrences of the said list:<text:line-break/>2<text:line-break/></text:span><text:a xlink:type="simple" xlink:href="https://www.w3resource.com/python-exercises/list/python-data-type-list-exercise-110.php" office:target-frame-name="_blank" xlink:show="new" text:style-name="Internet_20_link" text:visited-style-name="Visited_20_Internet_20_Link">Click me to see the sample solution</text:a></text:p>
      <text:p text:style-name="P5"><text:span text:style-name="Strong_20_Emphasis"><text:span text:style-name="T1">11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access multiple elements at a specified index from a given list.<text:line-break/>Original list:<text:line-break/>[2, 3, 8, 4, 7, 9, 8, 2, 6, 5, 1, 6, 1, 2, 3, 4, 6, 9, 1, 2]<text:line-break/>Index list:<text:line-break/>[0, 3, 5, 7, 10]<text:line-break/>Items with specified index of the said list:<text:line-break/>[2, 4, 9, 2, 1]<text:line-break/></text:span><text:a xlink:type="simple" xlink:href="https://www.w3resource.com/python-exercises/list/python-data-type-list-exercise-111.php" office:target-frame-name="_blank" xlink:show="new" text:style-name="Internet_20_link" text:visited-style-name="Visited_20_Internet_20_Link">Click me to see the sample solution</text:a></text:p>
      <text:p text:style-name="P5"><text:span text:style-name="Strong_20_Emphasis"><text:span text:style-name="T1">11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eck whether a specified list is sorted or not.<text:line-break/>Original list:<text:line-break/>[1, 2, 4, 6, 8, 10, 12, 14, 16, 17]<text:line-break/>Is the said list is sorted!<text:line-break/>True<text:line-break/>Original list:<text:line-break/>[1, 2, 4, 6, 8, 10, 12, 14, 16, 17]<text:line-break/>Is the said list is sorted!<text:line-break/>False<text:line-break/></text:span><text:a xlink:type="simple" xlink:href="https://www.w3resource.com/python-exercises/list/python-data-type-list-exercise-112.php" office:target-frame-name="_blank" xlink:show="new" text:style-name="Internet_20_link" text:visited-style-name="Visited_20_Internet_20_Link">Click me to see the sample solution</text:a></text:p>
      <text:p text:style-name="P5"><text:span text:style-name="Strong_20_Emphasis"><text:span text:style-name="T1">11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move duplicate dictionary entries from a given list.<text:line-break/>Original list with duplicate dictionary:<text:line-break/>[{'Green': '#008000'}, {'Black': '#000000'}, {'Blue': '#0000FF'}, {'Green': '#008000'}]<text:line-break/></text:span><text:soft-page-break/><text:span text:style-name="T1">After removing duplicate dictionary of the said list:<text:line-break/>[{'Black': '#000000'}, {'Blue': '#0000FF'}, {'Green': '#008000'}]<text:line-break/></text:span><text:a xlink:type="simple" xlink:href="https://www.w3resource.com/python-exercises/list/python-data-type-list-exercise-113.php" office:target-frame-name="_blank" xlink:show="new" text:style-name="Internet_20_link" text:visited-style-name="Visited_20_Internet_20_Link">Click me to see the sample solution</text:a></text:p>
      <text:p text:style-name="P4"><text:span text:style-name="Strong_20_Emphasis"><text:span text:style-name="T1">114.</text:span></text:span><text:span text:style-name="T1"> Write a Python program to extract the nth element from a given list of tuples.<text:line-break/>Original list:<text:line-break/>[('Greyson Fulton', 98, 99), ('Brady Kent', 97, 96), ('Wyatt Knott', 91, 94), ('Beau Turnbull', 94, 98)]<text:line-break/>Extract nth element ( n = 0 ) from the said list of tuples:<text:line-break/>['Greyson Fulton', 'Brady Kent', 'Wyatt Knott', 'Beau Turnbull']<text:line-break/>Extract nth element ( n = 2 ) from the said list of tuples:<text:line-break/>[99, 96, 94, 98]<text:line-break/></text:span><text:a xlink:type="simple" xlink:href="https://www.w3resource.com/python-exercises/list/python-data-type-list-exercise-114.php" office:target-frame-name="_blank" xlink:show="new" text:style-name="Internet_20_link" text:visited-style-name="Visited_20_Internet_20_Link">Click me to see the sample solution</text:a></text:p>
      <text:p text:style-name="P5"><text:span text:style-name="Strong_20_Emphasis"><text:span text:style-name="T1">11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eck if the elements of a given list are unique or not.<text:line-break/>Original list:<text:line-break/>[1, 2, 4, 6, 8, 2, 1, 4, 10, 12, 14, 12, 16, 17]<text:line-break/>Is the said list contains all unique elements!<text:line-break/>False<text:line-break/>Original list:<text:line-break/>[2, 4, 6, 8, 10, 12, 14]<text:line-break/>Is the said list contains all unique elements!<text:line-break/>True<text:line-break/></text:span><text:a xlink:type="simple" xlink:href="https://www.w3resource.com/python-exercises/list/python-data-type-list-exercise-115.php" office:target-frame-name="_blank" xlink:show="new" text:style-name="Internet_20_link" text:visited-style-name="Visited_20_Internet_20_Link">Click me to see the sample solution</text:a></text:p>
      <text:p text:style-name="P5"><text:span text:style-name="Strong_20_Emphasis"><text:span text:style-name="T1">11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ort a list of lists by a given index of the inner list.<text:line-break/>Original list:<text:line-break/>[('Greyson Fulton', 98, 99), ('Brady Kent', 97, 96), ('Wyatt Knott', 91, 94), ('Beau Turnbull', 94, 98)]<text:line-break/>Sort the said list of lists by a given index ( Index = 0 ) of the inner list<text:line-break/>[('Beau Turnbull', 94, 98), ('Brady Kent', 97, 96), ('Greyson Fulton', 98, 99), ('Wyatt Knott', 91, 94)]<text:line-break/>Sort the said list of lists by a given index ( Index = 2 ) of the inner list<text:line-break/>[('Wyatt Knott', 91, 94), ('Brady Kent', 97, 96), ('Beau Turnbull', 94, 98), ('Greyson Fulton', 98, 99)]<text:line-break/></text:span><text:a xlink:type="simple" xlink:href="https://www.w3resource.com/python-exercises/list/python-data-type-list-exercise-116.php" office:target-frame-name="_blank" xlink:show="new" text:style-name="Internet_20_link" text:visited-style-name="Visited_20_Internet_20_Link">Click me to see the sample solution</text:a></text:p>
      <text:p text:style-name="P5"><text:span text:style-name="Strong_20_Emphasis"><text:span text:style-name="T1">11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move all elements from a given list that are present in another list.<text:line-break/>Original lists:<text:line-break/>list1: [1, 2, 3, 4, 5, 6, 7, 8, 9, 10]<text:line-break/></text:span><text:soft-page-break/><text:span text:style-name="T1">list2: [2, 4, 6, 8]<text:line-break/>Remove all elements from 'list1' present in 'list2:<text:line-break/>[1, 3, 5, 7, 9, 10]<text:line-break/></text:span><text:a xlink:type="simple" xlink:href="https://www.w3resource.com/python-exercises/list/python-data-type-list-exercise-117.php" office:target-frame-name="_blank" xlink:show="new" text:style-name="Internet_20_link" text:visited-style-name="Visited_20_Internet_20_Link">Click me to see the sample solution</text:a></text:p>
      <text:p text:style-name="P5"><text:span text:style-name="Strong_20_Emphasis"><text:span text:style-name="T1">11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difference between elements (n+1th - nth) of a given list of numeric values.<text:line-break/>Original list:<text:line-break/>[1, 2, 3, 4, 5, 6, 7, 8, 9, 10]<text:line-break/>Dfference between elements (n+1th - nth) of the said list :<text:line-break/>[1, 1, 1, 1, 1, 1, 1, 1, 1]<text:line-break/>Original list:<text:line-break/>[2, 4, 6, 8]<text:line-break/>Dfference between elements (n+1th - nth) of the said list :<text:line-break/>[2, 2, 2]<text:line-break/></text:span><text:a xlink:type="simple" xlink:href="https://www.w3resource.com/python-exercises/list/python-data-type-list-exercise-118.php" office:target-frame-name="_blank" xlink:show="new" text:style-name="Internet_20_link" text:visited-style-name="Visited_20_Internet_20_Link">Click me to see the sample solution</text:a></text:p>
      <text:p text:style-name="P5"><text:span text:style-name="Strong_20_Emphasis"><text:span text:style-name="T1">11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eck if a substring appears in a given list of string values.<text:line-break/>Original list:<text:line-break/>['red', 'black', 'white', 'green', 'orange']<text:line-break/>Substring to search:<text:line-break/>ack<text:line-break/>Check if a substring presents in the said list of string values:<text:line-break/>True<text:line-break/>Substring to search:<text:line-break/>abc<text:line-break/>Check if a substring presents in the said list of string values:<text:line-break/>False<text:line-break/></text:span><text:a xlink:type="simple" xlink:href="https://www.w3resource.com/python-exercises/list/python-data-type-list-exercise-119.php" office:target-frame-name="_blank" xlink:show="new" text:style-name="Internet_20_link" text:visited-style-name="Visited_20_Internet_20_Link">Click me to see the sample solution</text:a></text:p>
      <text:p text:style-name="P5"><text:span text:style-name="Strong_20_Emphasis"><text:span text:style-name="T1">12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reate a list taking alternate elements from a given list.<text:line-break/>Original list:<text:line-break/>['red', 'black', 'white', 'green', 'orange']<text:line-break/>List with alternate elements from the said list:<text:line-break/>['red', 'white', 'orange']<text:line-break/>Original list:<text:line-break/>[2, 0, 3, 4, 0, 2, 8, 3, 4, 2]<text:line-break/>List with alternate elements from the said list:<text:line-break/></text:span><text:soft-page-break/><text:span text:style-name="T1">[2, 3, 0, 8, 4]<text:line-break/></text:span><text:a xlink:type="simple" xlink:href="https://www.w3resource.com/python-exercises/list/python-data-type-list-exercise-120.php" office:target-frame-name="_blank" xlink:show="new" text:style-name="Internet_20_link" text:visited-style-name="Visited_20_Internet_20_Link">Click me to see the sample solution</text:a></text:p>
      <text:p text:style-name="P5"><text:span text:style-name="Strong_20_Emphasis"><text:span text:style-name="T1">12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nested list elements that are present in another list.<text:line-break/>Original lists:<text:line-break/>[1, 2, 3, 4, 5, 6, 7, 8, 9, 10, 11, 12, 13, 14]<text:line-break/>[[12, 18, 23, 25, 45], [7, 11, 19, 24, 28], [1, 5, 8, 18, 15, 16]]<text:line-break/>Intersection of said nested lists:<text:line-break/>[[12], [7, 11], [1, 5, 8]]<text:line-break/></text:span><text:a xlink:type="simple" xlink:href="https://www.w3resource.com/python-exercises/list/python-data-type-list-exercise-121.php" office:target-frame-name="_blank" xlink:show="new" text:style-name="Internet_20_link" text:visited-style-name="Visited_20_Internet_20_Link">Click me to see the sample solution</text:a></text:p>
      <text:p text:style-name="P5"><text:span text:style-name="Strong_20_Emphasis"><text:span text:style-name="T1">12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common elements in a nested list.<text:line-break/>Original lists:<text:line-break/>[[12, 18, 23, 25, 45], [7, 12, 18, 24, 28], [1, 5, 8, 12, 15, 16, 18]]<text:line-break/>Common element(s) in nested lists:<text:line-break/>[18, 12]<text:line-break/></text:span><text:a xlink:type="simple" xlink:href="https://www.w3resource.com/python-exercises/list/python-data-type-list-exercise-122.php" office:target-frame-name="_blank" xlink:show="new" text:style-name="Internet_20_link" text:visited-style-name="Visited_20_Internet_20_Link">Click me to see the sample solution</text:a></text:p>
      <text:p text:style-name="P5"><text:span text:style-name="Strong_20_Emphasis"><text:span text:style-name="T1">12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verse strings in a given list of string values.<text:line-break/>Original lists:<text:line-break/>['Red', 'Green', 'Blue', 'White', 'Black']<text:line-break/>Reverse strings of the said given list:<text:line-break/>['deR', 'neerG', 'eulB', 'etihW', 'kcalB']<text:line-break/></text:span><text:a xlink:type="simple" xlink:href="https://www.w3resource.com/python-exercises/list/python-data-type-list-exercise-123.php" office:target-frame-name="_blank" xlink:show="new" text:style-name="Internet_20_link" text:visited-style-name="Visited_20_Internet_20_Link">Click me to see the sample solution</text:a></text:p>
      <text:p text:style-name="P4"><text:span text:style-name="Strong_20_Emphasis"><text:span text:style-name="T1">124.</text:span></text:span><text:span text:style-name="T1"> Write a Python program to find the maximum and minimum product of pairs of tuples within a given list.<text:line-break/>The original list, tuple :<text:line-break/>[(2, 7), (2, 6), (1, 8), (4, 9)]<text:line-break/>Maximum and minimum product from the pairs of the said tuple of list:<text:line-break/>(36, 8)<text:line-break/></text:span><text:a xlink:type="simple" xlink:href="https://www.w3resource.com/python-exercises/list/python-data-type-list-exercise-124.php" office:target-frame-name="_blank" xlink:show="new" text:style-name="Internet_20_link" text:visited-style-name="Visited_20_Internet_20_Link">Click me to see the sample solution</text:a></text:p>
      <text:p text:style-name="P5"><text:span text:style-name="Strong_20_Emphasis"><text:span text:style-name="T1">12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alculate the product of the unique numbers in a given list.<text:line-break/>Original List : [10, 20, 30, 40, 20, 50, 60, 40]<text:line-break/>Product of the unique numbers of the said list: 720000000<text:line-break/></text:span><text:a xlink:type="simple" xlink:href="https://www.w3resource.com/python-exercises/list/python-data-type-list-exercise-125.php" office:target-frame-name="_blank" xlink:show="new" text:style-name="Internet_20_link" text:visited-style-name="Visited_20_Internet_20_Link">Click me to see the sample solution</text:a></text:p>
      <text:p text:style-name="P5"><text:span text:style-name="Strong_20_Emphasis"><text:span text:style-name="T1">12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interleave multiple lists of the same length.<text:line-break/>Original list:<text:line-break/>list1: [1, 2, 3, 4, 5, 6, 7]<text:line-break/>list2: [10, 20, 30, 40, 50, 60, 70]<text:line-break/></text:span><text:soft-page-break/><text:span text:style-name="T1">list3: [100, 200, 300, 400, 500, 600, 700]<text:line-break/>Interleave multiple lists:<text:line-break/>[1, 10, 100, 2, 20, 200, 3, 30, 300, 4, 40, 400, 5, 50, 500, 6, 60, 600, 7, 70, 700]<text:line-break/></text:span><text:a xlink:type="simple" xlink:href="https://www.w3resource.com/python-exercises/list/python-data-type-list-exercise-126.php" office:target-frame-name="_blank" xlink:show="new" text:style-name="Internet_20_link" text:visited-style-name="Visited_20_Internet_20_Link">Click me to see the sample solution</text:a></text:p>
      <text:p text:style-name="P5"><text:span text:style-name="Strong_20_Emphasis"><text:span text:style-name="T1">12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move words from a given list of strings containing a character or string.<text:line-break/>Original list:<text:line-break/>list1: ['Red color', 'Orange#', 'Green', 'Orange @', 'White']<text:line-break/>Character list:<text:line-break/>['#', 'color', '@']<text:line-break/>New list:<text:line-break/>['Red', '', 'Green', 'Orange', 'White']<text:line-break/></text:span><text:a xlink:type="simple" xlink:href="https://www.w3resource.com/python-exercises/list/python-data-type-list-exercise-127.php" office:target-frame-name="_blank" xlink:show="new" text:style-name="Internet_20_link" text:visited-style-name="Visited_20_Internet_20_Link">Click me to see the sample solution</text:a></text:p>
      <text:p text:style-name="P5"><text:span text:style-name="Strong_20_Emphasis"><text:span text:style-name="T1">12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alculate the sum of the numbers in a list between the indices of a specified range.<text:line-break/>Original list:<text:line-break/>[2, 1, 5, 6, 8, 3, 4, 9, 10, 11, 8, 12]<text:line-break/>Range: 8 , 10<text:line-break/>Sum of the specified range:<text:line-break/>29<text:line-break/></text:span><text:a xlink:type="simple" xlink:href="https://www.w3resource.com/python-exercises/list/python-data-type-list-exercise-128.php" office:target-frame-name="_blank" xlink:show="new" text:style-name="Internet_20_link" text:visited-style-name="Visited_20_Internet_20_Link">Click me to see the sample solution</text:a></text:p>
      <text:p text:style-name="P4"><text:span text:style-name="Strong_20_Emphasis"><text:span text:style-name="T1">129.</text:span></text:span><text:span text:style-name="T1"> Write a Python program to reverse each list in a given list of lists.<text:line-break/>Original list of lists:<text:line-break/>[[1, 2, 3, 4], [5, 6, 7, 8], [9, 10, 11, 12], [13, 14, 15, 16]]<text:line-break/>Reverse each list in the said list of lists:<text:line-break/>[[4, 3, 2, 1], [8, 7, 6, 5], [12, 11, 10, 9], [16, 15, 14, 13]]<text:line-break/></text:span><text:a xlink:type="simple" xlink:href="https://www.w3resource.com/python-exercises/list/python-data-type-list-exercise-129.php" office:target-frame-name="_blank" xlink:show="new" text:style-name="Internet_20_link" text:visited-style-name="Visited_20_Internet_20_Link">Click me to see the sample solution</text:a></text:p>
      <text:p text:style-name="P5"><text:span text:style-name="Strong_20_Emphasis"><text:span text:style-name="T1">13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unt the same pair in three given lists.<text:line-break/>Original lists:<text:line-break/>[1, 2, 3, 4, 5, 6, 7, 8]<text:line-break/>[2, 2, 3, 1, 2, 6, 7, 9]<text:line-break/>[2, 1, 3, 1, 2, 6, 7, 9]<text:line-break/>Number of same pair of the said three given lists:<text:line-break/>3<text:line-break/></text:span><text:a xlink:type="simple" xlink:href="https://www.w3resource.com/python-exercises/list/python-data-type-list-exercise-130.php" office:target-frame-name="_blank" xlink:show="new" text:style-name="Internet_20_link" text:visited-style-name="Visited_20_Internet_20_Link">Click me to see the sample solution</text:a></text:p>
      <text:p text:style-name="P5"><text:span text:style-name="Strong_20_Emphasis"><text:span text:style-name="T1">13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unt the frequency of consecutive duplicate elements in a given list of numbers.<text:line-break/></text:span><text:soft-page-break/><text:span text:style-name="T1">Original lists:<text:line-break/>[1, 2, 2, 2, 4, 4, 4, 5, 5, 5, 5]<text:line-break/>Consecutive duplicate elements and their frequency:<text:line-break/>([1, 2, 4, 5], [1, 3, 3, 4])<text:line-break/></text:span><text:a xlink:type="simple" xlink:href="https://www.w3resource.com/python-exercises/list/python-data-type-list-exercise-131.php" office:target-frame-name="_blank" xlink:show="new" text:style-name="Internet_20_link" text:visited-style-name="Visited_20_Internet_20_Link">Click me to see the sample solution</text:a></text:p>
      <text:p text:style-name="P5"><text:span text:style-name="Strong_20_Emphasis"><text:span text:style-name="T1">13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all index positions of the maximum and minimum values in a given list of numbers.<text:line-break/>Original list:<text:line-break/>[12, 33, 23, 10, 67, 89, 45, 667, 23, 12, 11, 10, 54]<text:line-break/>Index positions of the maximum value of the said list:<text:line-break/>7<text:line-break/>Index positions of the minimum value of the said list:<text:line-break/>3, 11<text:line-break/></text:span><text:a xlink:type="simple" xlink:href="https://www.w3resource.com/python-exercises/list/python-data-type-list-exercise-132.php" office:target-frame-name="_blank" xlink:show="new" text:style-name="Internet_20_link" text:visited-style-name="Visited_20_Internet_20_Link">Click me to see the sample solution</text:a></text:p>
      <text:p text:style-name="P5"><text:span text:style-name="Strong_20_Emphasis"><text:span text:style-name="T1">13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eck if two lists have the same elements in them in same order or not.<text:line-break/>Original lists:<text:line-break/>['red', 'green', 'black', 'orange']<text:line-break/>['red', 'pink', 'green', 'white', 'black']<text:line-break/>['white', 'orange', 'pink', 'black']<text:line-break/>Test common elements between color1 and color2 are in same order?<text:line-break/>True<text:line-break/>Test common elements between color1 and color3 are in same order?<text:line-break/>False<text:line-break/>Test common elements between color2 and color3 are in same order?<text:line-break/>False<text:line-break/></text:span><text:a xlink:type="simple" xlink:href="https://www.w3resource.com/python-exercises/list/python-data-type-list-exercise-133.php" office:target-frame-name="_blank" xlink:show="new" text:style-name="Internet_20_link" text:visited-style-name="Visited_20_Internet_20_Link">Click me to see the sample solution</text:a></text:p>
      <text:p text:style-name="P5"><text:span text:style-name="Strong_20_Emphasis"><text:span text:style-name="T1">13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difference between two lists including duplicate elements.<text:line-break/>Original lists:<text:line-break/>[1, 1, 2, 3, 3, 4, 4, 5, 6, 7]<text:line-break/>[1, 1, 2, 4, 5, 6]<text:line-break/>Difference between two said list including duplicate elements):<text:line-break/>[3, 3, 4, 7]<text:line-break/></text:span><text:a xlink:type="simple" xlink:href="https://www.w3resource.com/python-exercises/list/python-data-type-list-exercise-134.php" office:target-frame-name="_blank" xlink:show="new" text:style-name="Internet_20_link" text:visited-style-name="Visited_20_Internet_20_Link">Click me to see the sample solution</text:a></text:p>
      <text:p text:style-name="P5"><text:span text:style-name="Strong_20_Emphasis"><text:span text:style-name="T1">13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iterate over all pairs of consecutive items in a given list.<text:line-break/>Original lists:<text:line-break/></text:span><text:soft-page-break/><text:span text:style-name="T1">[1, 1, 2, 3, 3, 4, 4, 5]<text:line-break/>Iterate over all pairs of consecutive items of the said list:<text:line-break/>[(1, 1), (1, 2), (2, 3), (3, 3), (3, 4), (4, 4), (4, 5)]<text:line-break/></text:span><text:a xlink:type="simple" xlink:href="https://www.w3resource.com/python-exercises/list/python-data-type-list-exercise-135.php" office:target-frame-name="_blank" xlink:show="new" text:style-name="Internet_20_link" text:visited-style-name="Visited_20_Internet_20_Link">Click me to see the sample solution</text:a></text:p>
      <text:p text:style-name="P5"><text:span text:style-name="Strong_20_Emphasis"><text:span text:style-name="T1">13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move duplicate words from a given list of strings.<text:line-break/>Original String:<text:line-break/>['Python', 'Exercises', 'Practice', 'Solution', 'Exercises']<text:line-break/>After removing duplicate words from the said list of strings:<text:line-break/>['Python', 'Exercises', 'Practice', 'Solution']<text:line-break/></text:span><text:a xlink:type="simple" xlink:href="https://www.w3resource.com/python-exercises/list/python-data-type-list-exercise-136.php" office:target-frame-name="_blank" xlink:show="new" text:style-name="Internet_20_link" text:visited-style-name="Visited_20_Internet_20_Link">Click me to see the sample solution</text:a></text:p>
      <text:p text:style-name="P4"><text:span text:style-name="Strong_20_Emphasis"><text:span text:style-name="T1">137.</text:span></text:span><text:span text:style-name="T1"> Write a Python program to find the first even and odd number in a given list of numbers.<text:line-break/>Original list:<text:line-break/>[1, 3, 5, 7, 4, 1, 6, 8]<text:line-break/>First even and odd number of the said list of numbers:<text:line-break/>(4, 1)<text:line-break/></text:span><text:a xlink:type="simple" xlink:href="https://www.w3resource.com/python-exercises/list/python-data-type-list-exercise-137.php" office:target-frame-name="_blank" xlink:show="new" text:style-name="Internet_20_link" text:visited-style-name="Visited_20_Internet_20_Link">Click me to see the sample solution</text:a></text:p>
      <text:section text:style-name="Sect2" text:name="autors-container-0">
        <text:p text:style-name="P3"><draw:frame draw:style-name="fr1" draw:name="Object2" text:anchor-type="as-char" svg:width="8.6874in" svg:height="3.6146in" draw:z-index="1"><draw:floating-frame xlink:href="https://www.adsensecustomsearchads.com/afs/ads?psid=5134551505&amp;channel=AutoRsVariant&amp;cx=r-440389826592af9d2&amp;fexp=42532561%2C21404%2C17301431%2C17301432%2C17301436%2C17301504%2C17301509&amp;client=pub-2153208817642134&amp;r=m&amp;hl=en&amp;rpbu=http%3A%2F%2Fgoogle.com&amp;rpqp=q&amp;type=3&amp;rs_tt=c&amp;oe=UTF-8&amp;ie=UTF-8&amp;client_gdprApplies=0&amp;format=r5&amp;nocache=551718806210066&amp;num=0&amp;output=afd_ads&amp;domain_name=www.w3resource.com&amp;v=3&amp;bsl=10&amp;pac=0&amp;u_his=3&amp;u_tz=0&amp;dt=1718806210069&amp;u_w=1536&amp;u_h=864&amp;biw=1519&amp;bih=742&amp;psw=1519&amp;psh=808&amp;frm=0&amp;uio=-&amp;cont=autors-container-0&amp;drt=0&amp;jsid=csa&amp;nfp=1&amp;jsv=641883529&amp;rurl=https%3A%2F%2Fwww.w3resource.com%2Fpython-exercises%2Flist%2F&amp;referer=https%3A%2F%2Fwww.google.com%2F" xlink:type="simple" xlink:show="embed" xlink:actuate="onLoad" draw:frame-name="{&quot;name&quot;:&quot;master-1&quot;,&quot;master-1&quot;:{&quot;container&quot;:&quot;autors-container-0&quot;,&quot;styleId&quot;:&quot;5134551505&quot;,&quot;channel&quot;:&quot;AutoRsVariant&quot;,&quot;cx&quot;:&quot;r-440389826592af9d2&quot;,&quot;domainName&quot;:&quot;www.w3resource.com&quot;,&quot;fexp&quot;:&quot;42532561,21404,17301431,17301432,17301436,17301504,17301509&quot;,&quot;masterNumber&quot;:1,&quot;number&quot;:0,&quot;pubId&quot;:&quot;pub-2153208817642134&quot;,&quot;role&quot;:&quot;m&quot;,&quot;hl&quot;:&quot;en&quot;,&quot;client_gdprApplies&quot;:0,&quot;resultsPageBaseUrl&quot;:&quot;http://google.com&quot;,&quot;columns&quot;:1,&quot;horizontalAlignment&quot;:&quot;left&quot;,&quot;resultsPageQueryParam&quot;:&quot;q&quot;,&quot;relatedSearchUseResultCallback&quot;:true,&quot;ie&quot;:&quot;UTF-8&quot;,&quot;maxTop&quot;:0,&quot;minTop&quot;:0,&quot;oe&quot;:&quot;UTF-8&quot;,&quot;relatedSearches&quot;:5,&quot;type&quot;:&quot;relatedsearch&quot;,&quot;linkTarget&quot;:&quot;_blank&quot;,&quot;fontSizeTitle&quot;:18,&quot;fontSizeAttribution&quot;:13,&quot;relatedSearchTargeting&quot;:&quot;content&quot;}}"/></draw:frame></text:p>
      </text:section>
      <text:p text:style-name="P5"><text:span text:style-name="Strong_20_Emphasis"><text:span text:style-name="T1">13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ort a given mixed list of integers and strings. Numbers must be sorted before strings.<text:line-break/>Original list:<text:line-break/>[19, 'red', 12, 'green', 'blue', 10, 'white', 'green', 1]<text:line-break/>Sort the said mixed list of integers and strings:<text:line-break/></text:span><text:soft-page-break/><text:span text:style-name="T1">[1, 10, 12, 19, 'blue', 'green', 'green', 'red', 'white']<text:line-break/></text:span><text:a xlink:type="simple" xlink:href="https://www.w3resource.com/python-exercises/list/python-data-type-list-exercise-138.php" office:target-frame-name="_blank" xlink:show="new" text:style-name="Internet_20_link" text:visited-style-name="Visited_20_Internet_20_Link">Click me to see the sample solution</text:a></text:p>
      <text:p text:style-name="P5"><text:span text:style-name="Strong_20_Emphasis"><text:span text:style-name="T1">13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ort a given list of strings(numbers) numerically.<text:line-break/>Original list:<text:line-break/>['4', '12', '45', '7', '0', '100', '200', '-12', '-500']<text:line-break/>Sort the said list of strings(numbers) numerically:<text:line-break/>[-500, -12, 0, 4, 7, 12, 45, 100, 200]<text:line-break/></text:span><text:a xlink:type="simple" xlink:href="https://www.w3resource.com/python-exercises/list/python-data-type-list-exercise-139.php" office:target-frame-name="_blank" xlink:show="new" text:style-name="Internet_20_link" text:visited-style-name="Visited_20_Internet_20_Link">Click me to see the sample solution</text:a></text:p>
      <text:p text:style-name="P4"><text:span text:style-name="Strong_20_Emphasis"><text:span text:style-name="T1">140.</text:span></text:span><text:span text:style-name="T1"> Write a Python program to remove a specific item from a given list of lists.<text:line-break/>Original list of lists:<text:line-break/>[['Red', 'Maroon', 'Yellow', 'Olive'], ['#FF0000', '#800000', '#FFFF00', '#808000'], ['rgb(255,0,0)', 'rgb(128,0,0)', 'rgb(255,255,0)', 'rgb(128,128,0)']]<text:line-break/>Remove 1st list from the saod given list of lists:<text:line-break/>[['Maroon', 'Yellow', 'Olive'], ['#800000', '#FFFF00', '#808000'], ['rgb(128,0,0)', 'rgb(255,255,0)', 'rgb(128,128,0)']]<text:line-break/>Remove 2nd list from the saod given list of lists:<text:line-break/>[['Red', 'Yellow', 'Olive'], ['#FF0000', '#FFFF00', '#808000'], ['rgb(255,0,0)', 'rgb(255,255,0)', 'rgb(128,128,0)']]<text:line-break/>Remove 4th list from the saod given list of lists:<text:line-break/>[['Red', 'Maroon', 'Yellow'], ['#FF0000', '#800000', '#FFFF00'], ['rgb(255,0,0)', 'rgb(128,0,0)', 'rgb(255,255,0)']]<text:line-break/></text:span><text:a xlink:type="simple" xlink:href="https://www.w3resource.com/python-exercises/list/python-data-type-list-exercise-140.php" office:target-frame-name="_blank" xlink:show="new" text:style-name="Internet_20_link" text:visited-style-name="Visited_20_Internet_20_Link">Click me to see the sample solution</text:a></text:p>
      <text:p text:style-name="P5"><text:span text:style-name="Strong_20_Emphasis"><text:span text:style-name="T1">14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move empty lists from a given list of lists.<text:line-break/>Original list:<text:line-break/>[[], [], [], 'Red', 'Green', [1, 2], 'Blue', [], []]<text:line-break/>After deleting the empty lists from the said lists of lists<text:line-break/>['Red', 'Green', [1, 2], 'Blue']<text:line-break/></text:span><text:a xlink:type="simple" xlink:href="https://www.w3resource.com/python-exercises/list/python-data-type-list-exercise-141.php" office:target-frame-name="_blank" xlink:show="new" text:style-name="Internet_20_link" text:visited-style-name="Visited_20_Internet_20_Link">Click me to see the sample solution</text:a></text:p>
      <text:p text:style-name="P5"><text:span text:style-name="Strong_20_Emphasis"><text:span text:style-name="T1">14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um a specific column of a list in a given list of lists.<text:line-break/>Original list of lists:<text:line-break/>[[1, 2, 3, 2], [4, 5, 6, 2], [7, 8, 9, 5]]<text:line-break/>Sum: 1st column of the said list of lists:<text:line-break/>12<text:line-break/>Sum: 2nd column of the said list of lists:<text:line-break/>15<text:line-break/>Sum: 4th column of the said list of lists:<text:line-break/></text:span><text:soft-page-break/><text:span text:style-name="T1">9<text:line-break/></text:span><text:a xlink:type="simple" xlink:href="https://www.w3resource.com/python-exercises/list/python-data-type-list-exercise-142.php" office:target-frame-name="_blank" xlink:show="new" text:style-name="Internet_20_link" text:visited-style-name="Visited_20_Internet_20_Link">Click me to see the sample solution</text:a></text:p>
      <text:p text:style-name="P5"><text:span text:style-name="Strong_20_Emphasis"><text:span text:style-name="T1">14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t the frequency of elements in a given list of lists.<text:line-break/>Original list of lists:<text:line-break/>[[1, 2, 3, 2], [4, 5, 6, 2], [7, 8, 9, 5]]<text:line-break/>Frequency of the elements in the said list of lists:<text:line-break/>{1: 1, 2: 3, 3: 1, 4: 1, 5: 2, 6: 1, 7: 1, 8: 1, 9: 1}<text:line-break/></text:span><text:a xlink:type="simple" xlink:href="https://www.w3resource.com/python-exercises/list/python-data-type-list-exercise-143.php" office:target-frame-name="_blank" xlink:show="new" text:style-name="Internet_20_link" text:visited-style-name="Visited_20_Internet_20_Link">Click me to see the sample solution</text:a></text:p>
      <text:p text:style-name="P5"><text:span text:style-name="Strong_20_Emphasis"><text:span text:style-name="T1">14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extract every first or specified element from a given two-dimensional list.<text:line-break/>Original list of lists:<text:line-break/>[[1, 2, 3, 2], [4, 5, 6, 2], [7, 1, 9, 5]]<text:line-break/>Extract every first element from the said given two dimensional list:<text:line-break/>[1, 4, 7]<text:line-break/>Extract every third element from the said given two dimensional list:<text:line-break/>[3, 6, 9]<text:line-break/></text:span><text:a xlink:type="simple" xlink:href="https://www.w3resource.com/python-exercises/list/python-data-type-list-exercise-144.php" office:target-frame-name="_blank" xlink:show="new" text:style-name="Internet_20_link" text:visited-style-name="Visited_20_Internet_20_Link">Click me to see the sample solution</text:a></text:p>
      <text:p text:style-name="P5"><text:span text:style-name="Strong_20_Emphasis"><text:span text:style-name="T1">14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nerate a number in a specified range except for some specific numbers.<text:line-break/>Generate a number in a specified range (1, 10) except [2, 9, 10]<text:line-break/>7<text:line-break/>Generate a number in a specified range (-5, 5) except [-5,0,4,3,2]<text:line-break/>-4<text:line-break/></text:span><text:a xlink:type="simple" xlink:href="https://www.w3resource.com/python-exercises/list/python-data-type-list-exercise-145.php" office:target-frame-name="_blank" xlink:show="new" text:style-name="Internet_20_link" text:visited-style-name="Visited_20_Internet_20_Link">Click me to see the sample solution</text:a></text:p>
      <text:p text:style-name="P5"><text:span text:style-name="Strong_20_Emphasis"><text:span text:style-name="T1">14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mpute the sum of digits of each number in a given list.<text:line-break/>Original tuple:<text:line-break/>[10, 2, 56]<text:line-break/>Sum of digits of each number of the said list of integers:<text:line-break/>14<text:line-break/>Original tuple:<text:line-break/>[10, 20, 4, 5, 'b', 70, 'a']<text:line-break/>Sum of digits of each number of the said list of integers:<text:line-break/>19<text:line-break/>Original tuple:<text:line-break/>[10, 20, -4, 5, -70]<text:line-break/>Sum of digits of each number of the said list of integers:<text:line-break/></text:span><text:soft-page-break/><text:span text:style-name="T1">19<text:line-break/></text:span><text:a xlink:type="simple" xlink:href="https://www.w3resource.com/python-exercises/list/python-data-type-list-exercise-146.php" office:target-frame-name="_blank" xlink:show="new" text:style-name="Internet_20_link" text:visited-style-name="Visited_20_Internet_20_Link">Click me to see the sample solution</text:a></text:p>
      <text:p text:style-name="P5"><text:span text:style-name="Strong_20_Emphasis"><text:span text:style-name="T1">14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mbine two lists into another list randomly.<text:line-break/>Original lists:<text:line-break/>[1, 2, 7, 8, 3, 7]<text:line-break/>[4, 3, 8, 9, 4, 3, 8, 9]<text:line-break/>Interleave two given list into another list randomly:<text:line-break/>[4, 1, 2, 3, 8, 9, 4, 3, 7, 8, 9, 8, 3, 7]<text:line-break/></text:span><text:a xlink:type="simple" xlink:href="https://www.w3resource.com/python-exercises/list/python-data-type-list-exercise-147.php" office:target-frame-name="_blank" xlink:show="new" text:style-name="Internet_20_link" text:visited-style-name="Visited_20_Internet_20_Link">Click me to see the sample solution</text:a></text:p>
      <text:p text:style-name="P5"><text:span text:style-name="Strong_20_Emphasis"><text:span text:style-name="T1">14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move specific words from a given list.<text:line-break/>Original list:<text:line-break/>['red', 'green', 'blue', 'white', 'black', 'orange']<text:line-break/>Remove words:<text:line-break/>['white', 'orange']<text:line-break/>After removing the specified words from the said list:<text:line-break/>['red', 'green', 'blue', 'black']<text:line-break/></text:span><text:a xlink:type="simple" xlink:href="https://www.w3resource.com/python-exercises/list/python-data-type-list-exercise-148.php" office:target-frame-name="_blank" xlink:show="new" text:style-name="Internet_20_link" text:visited-style-name="Visited_20_Internet_20_Link">Click me to see the sample solution</text:a></text:p>
      <text:p text:style-name="P4"><text:span text:style-name="Strong_20_Emphasis"><text:span text:style-name="T1">149.</text:span></text:span><text:span text:style-name="T1"> Write a Python program to get all possible combinations of the elements of a given list.<text:line-break/>Original list:<text:line-break/>['orange', 'red', 'green', 'blue']<text:line-break/>All possible combinations of the said list's elements:<text:line-break/>[[], ['orange'], ['red'], ['red', 'orange'], ['green'], ['green', 'orange'], ['green', 'red'], ['green', 'red', 'orange'], ['blue'], ['blue', 'orange'], ['blue', 'red'], ['blue', 'red', 'orange'], ['blue', 'green'], ['blue', 'green', 'orange'], ['blue', 'green', 'red'], ['blue', 'green', 'red', 'orange']]<text:line-break/></text:span><text:a xlink:type="simple" xlink:href="https://www.w3resource.com/python-exercises/list/python-data-type-list-exercise-149.php" office:target-frame-name="_blank" xlink:show="new" text:style-name="Internet_20_link" text:visited-style-name="Visited_20_Internet_20_Link">Click me to see the sample solution</text:a></text:p>
      <text:p text:style-name="P5"><text:span text:style-name="Strong_20_Emphasis"><text:span text:style-name="T1">15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verse a given list of lists.<text:line-break/>Original list:<text:line-break/>[['orange', 'red'], ['green', 'blue'], ['white', 'black', 'pink']]<text:line-break/>Reverse said list of lists:<text:line-break/>[['white', 'black', 'pink'], ['green', 'blue'], ['orange', 'red']]<text:line-break/>Original list:<text:line-break/>[[1, 2, 3, 4], [0, 2, 4, 5], [2, 3, 4, 2, 4]]<text:line-break/>Reverse said list of lists:<text:line-break/>[[2, 3, 4, 2, 4], [0, 2, 4, 5], [1, 2, 3, 4]]<text:line-break/></text:span><text:a xlink:type="simple" xlink:href="https://www.w3resource.com/python-exercises/list/python-data-type-list-exercise-150.php" office:target-frame-name="_blank" xlink:show="new" text:style-name="Internet_20_link" text:visited-style-name="Visited_20_Internet_20_Link">Click me to see the sample solution</text:a></text:p>
      <text:p text:style-name="P5"><text:soft-page-break/><text:span text:style-name="Strong_20_Emphasis"><text:span text:style-name="T1">15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maximum and minimum values in a given list within a specified index range.<text:line-break/>Original list:<text:line-break/>[4, 3, 0, 5, 3, 0, 2, 3, 4, 2, 4, 3, 5]<text:line-break/>Index range:<text:line-break/>3 to 8<text:line-break/>Maximum and minimum values of the said given list within index range:<text:line-break/>(5, 0)<text:line-break/></text:span><text:a xlink:type="simple" xlink:href="https://www.w3resource.com/python-exercises/list/python-data-type-list-exercise-151.php" office:target-frame-name="_blank" xlink:show="new" text:style-name="Internet_20_link" text:visited-style-name="Visited_20_Internet_20_Link">Click me to see the sample solution</text:a></text:p>
      <text:p text:style-name="P5"><text:span text:style-name="Strong_20_Emphasis"><text:span text:style-name="T1">15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mbine two sorted lists using the heapq module.<text:line-break/>Original sorted lists:<text:line-break/>[1, 3, 5, 7, 9, 11]<text:line-break/>[0, 2, 4, 6, 8, 10]<text:line-break/>After merging the said two sorted lists:<text:line-break/>[0, 1, 2, 3, 4, 5, 6, 7, 8, 9, 10, 11]<text:line-break/></text:span><text:a xlink:type="simple" xlink:href="https://www.w3resource.com/python-exercises/list/python-data-type-list-exercise-152.php" office:target-frame-name="_blank" xlink:show="new" text:style-name="Internet_20_link" text:visited-style-name="Visited_20_Internet_20_Link">Click me to see the sample solution</text:a></text:p>
      <text:p text:style-name="P5"><text:span text:style-name="Strong_20_Emphasis"><text:span text:style-name="T1">15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eck if a given element occurs at least n times in a list.<text:line-break/>Original list:<text:line-break/>[0, 1, 3, 5, 0, 3, 4, 5, 0, 8, 0, 3, 6, 0, 3, 1, 1, 0]<text:line-break/>Check if 3 occurs at least 4 times in a list:<text:line-break/>True<text:line-break/>Check if 0 occurs at least 5 times in a list:<text:line-break/>True<text:line-break/>Check if 8 occurs at least 3 times in a list:<text:line-break/>False<text:line-break/></text:span><text:a xlink:type="simple" xlink:href="https://www.w3resource.com/python-exercises/list/python-data-type-list-exercise-153.php" office:target-frame-name="_blank" xlink:show="new" text:style-name="Internet_20_link" text:visited-style-name="Visited_20_Internet_20_Link">Click me to see the sample solution</text:a></text:p>
      <text:p text:style-name="P5"><text:span text:style-name="Strong_20_Emphasis"><text:span text:style-name="T1">15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join two given list of lists of the same length, element wise.<text:line-break/>Original lists:<text:line-break/>[[10, 20], [30, 40], [50, 60], [30, 20, 80]]<text:line-break/>[[61], [12, 14, 15], [12, 13, 19, 20], [12]]<text:line-break/>Join the said two lists element wise:<text:line-break/>[[10, 20, 61], [30, 40, 12, 14, 15], [50, 60, 12, 13, 19, 20], [30, 20, 80, 12]]<text:line-break/>Original lists:<text:line-break/>[['a', 'b'], ['b', 'c', 'd'], ['e', 'f']]<text:line-break/>[['p', 'q'], ['p', 's', 't'], ['u', 'v', 'w']]<text:line-break/>Join the said two lists element wise:<text:line-break/></text:span><text:soft-page-break/><text:span text:style-name="T1">[['a', 'b', 'p', 'q'], ['b', 'c', 'd', 'p', 's', 't'], ['e', 'f', 'u', 'v', 'w']]<text:line-break/></text:span><text:a xlink:type="simple" xlink:href="https://www.w3resource.com/python-exercises/list/python-data-type-list-exercise-154.php" office:target-frame-name="_blank" xlink:show="new" text:style-name="Internet_20_link" text:visited-style-name="Visited_20_Internet_20_Link">Click me to see the sample solution</text:a></text:p>
      <text:p text:style-name="P5"><text:span text:style-name="Strong_20_Emphasis"><text:span text:style-name="T1">15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add two given lists of different lengths, starting on the left.<text:line-break/>Original lists:<text:line-break/>[2, 4, 7, 0, 5, 8]<text:line-break/>[3, 3, -1, 7]<text:line-break/>Add said two lists from left:<text:line-break/>[5, 7, 6, 7, 5, 8]<text:line-break/>Original lists:<text:line-break/>[1, 2, 3, 4, 5, 6]<text:line-break/>[2, 4, -3]<text:line-break/>Add said two lists from left:<text:line-break/>[3, 6, 0, 4, 5, 6]<text:line-break/></text:span><text:a xlink:type="simple" xlink:href="https://www.w3resource.com/python-exercises/list/python-data-type-list-exercise-155.php" office:target-frame-name="_blank" xlink:show="new" text:style-name="Internet_20_link" text:visited-style-name="Visited_20_Internet_20_Link">Click me to see the sample solution</text:a></text:p>
      <text:p text:style-name="P5"><text:span text:style-name="Strong_20_Emphasis"><text:span text:style-name="T1">15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add two given lists of different lengths, starting on the right.<text:line-break/>Original lists:<text:line-break/>[2, 4, 7, 0, 5, 8]<text:line-break/>[3, 3, -1, 7]<text:line-break/>Add said two lists from left:<text:line-break/>[2, 4, 10, 3, 4, 15]<text:line-break/>Original lists:<text:line-break/>[1, 2, 3, 4, 5, 6]<text:line-break/>[2, 4, -3]<text:line-break/>Add said two lists from left:<text:line-break/>[1, 2, 3, 6, 9, 3]<text:line-break/></text:span><text:a xlink:type="simple" xlink:href="https://www.w3resource.com/python-exercises/list/python-data-type-list-exercise-156.php" office:target-frame-name="_blank" xlink:show="new" text:style-name="Internet_20_link" text:visited-style-name="Visited_20_Internet_20_Link">Click me to see the sample solution</text:a></text:p>
      <text:p text:style-name="P5"><text:span text:style-name="Strong_20_Emphasis"><text:span text:style-name="T1">15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interleave lists of varying lengths.<text:line-break/>Original lists:<text:line-break/>[2, 4, 7, 0, 5, 8]<text:line-break/>[2, 5, 8]<text:line-break/>[0, 1]<text:line-break/>[3, 3, -1, 7]<text:line-break/>Interleave said lists of different lengths:<text:line-break/>[2, 2, 0, 3, 4, 5, 1, 3, 7, 8, -1, 0, 7, 5, 8]<text:line-break/></text:span><text:a xlink:type="simple" xlink:href="https://www.w3resource.com/python-exercises/list/python-data-type-list-exercise-157.php" office:target-frame-name="_blank" xlink:show="new" text:style-name="Internet_20_link" text:visited-style-name="Visited_20_Internet_20_Link">Click me to see the sample solution</text:a></text:p>
      <text:p text:style-name="P5"><text:soft-page-break/><text:span text:style-name="Strong_20_Emphasis"><text:span text:style-name="T1">15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maximum and minimum values in a given list of tuples.<text:line-break/>Original list with tuples:<text:line-break/>[('V', 60), ('VI', 70), ('VII', 75), ('VIII', 72), ('IX', 78), ('X', 70)]<text:line-break/>Maximum and minimum values of the said list of tuples:<text:line-break/>(78, 60)<text:line-break/></text:span><text:a xlink:type="simple" xlink:href="https://www.w3resource.com/python-exercises/list/python-data-type-list-exercise-158.php" office:target-frame-name="_blank" xlink:show="new" text:style-name="Internet_20_link" text:visited-style-name="Visited_20_Internet_20_Link">Click me to see the sample solution</text:a></text:p>
      <text:p text:style-name="P4"><text:span text:style-name="Strong_20_Emphasis"><text:span text:style-name="T1">159.</text:span></text:span><text:span text:style-name="T1"> Write a Python program to append the same value/a list multiple times to a list/list-of-lists.<text:line-break/>Add a value(7), 5 times, to a list:<text:line-break/>['7', '7', '7', '7', '7']<text:line-break/>Add 5, 6 times, to a list:<text:line-break/>[1, 2, 3, 4, 5, 5, 5, 5, 5, 5]<text:line-break/>Add a list, 4 times, to a list of lists:<text:line-break/>[[1, 2, 5], [1, 2, 5], [1, 2, 5], [1, 2, 5]]<text:line-break/>Add a list, 3 times, to a list of lists:<text:line-break/>[[5, 6, 7], [1, 2, 5], [1, 2, 5], [1, 2, 5], [1, 2, 5]]<text:line-break/></text:span><text:a xlink:type="simple" xlink:href="https://www.w3resource.com/python-exercises/list/python-data-type-list-exercise-159.php" office:target-frame-name="_blank" xlink:show="new" text:style-name="Internet_20_link" text:visited-style-name="Visited_20_Internet_20_Link">Click me to see the sample solution</text:a></text:p>
      <text:p text:style-name="P5"><text:span text:style-name="Strong_20_Emphasis"><text:span text:style-name="T1">16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move the first specified number of elements from a given list satisfying a condition.<text:line-break/>Remove the first 4 number of even numbers from the following list:<text:line-break/>[3,10,4,7,5,7,8,3,3,4,5,9,3,4,9,8,5]<text:line-break/>Output:<text:line-break/>[3, 7, 5, 7, 3, 3, 5, 9, 3, 4, 9, 8, 5]<text:line-break/>Original list:<text:line-break/>[3, 10, 4, 7, 5, 7, 8, 3, 3, 4, 5, 9, 3, 4, 9, 8, 5]<text:line-break/>Remove first 4 even numbers from the said list:<text:line-break/>[3, 7, 5, 7, 3, 3, 5, 9, 3, 4, 9, 8, 5]<text:line-break/></text:span><text:a xlink:type="simple" xlink:href="https://www.w3resource.com/python-exercises/list/python-data-type-list-exercise-160.php" office:target-frame-name="_blank" xlink:show="new" text:style-name="Internet_20_link" text:visited-style-name="Visited_20_Internet_20_Link">Click me to see the sample solution</text:a></text:p>
      <text:p text:style-name="P5"><text:span text:style-name="Strong_20_Emphasis"><text:span text:style-name="T1">16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eck if a given list increases strictly. Moreover, if removing only one element from the list results in a strictly increasing list, we still consider the list true.<text:line-break/>True<text:line-break/>True<text:line-break/>True<text:line-break/>True<text:line-break/>True<text:line-break/></text:span><text:soft-page-break/><text:span text:style-name="T1">True<text:line-break/>True<text:line-break/>True<text:line-break/>True<text:line-break/>True<text:line-break/>True<text:line-break/>False<text:line-break/>False<text:line-break/>False<text:line-break/>False<text:line-break/>False<text:line-break/></text:span><text:a xlink:type="simple" xlink:href="https://www.w3resource.com/python-exercises/list/python-data-type-list-exercise-161.php" office:target-frame-name="_blank" xlink:show="new" text:style-name="Internet_20_link" text:visited-style-name="Visited_20_Internet_20_Link">Click me to see the sample solution</text:a></text:p>
      <text:p text:style-name="P5"><text:span text:style-name="Strong_20_Emphasis"><text:span text:style-name="T1">16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last occurrence of a specified item in a given list.<text:line-break/>Original list:<text:line-break/>['s', 'd', 'f', 's', 'd', 'f', 's', 'f', 'k', 'o', 'p', 'i', 'w', 'e', 'k', 'c']<text:line-break/>Last occurrence of f in the said list:<text:line-break/>7<text:line-break/>Last occurrence of c in the said list:<text:line-break/>15<text:line-break/>Last occurrence of k in the said list:<text:line-break/>14<text:line-break/>Last occurrence of w in the said list:<text:line-break/>12<text:line-break/></text:span><text:a xlink:type="simple" xlink:href="https://www.w3resource.com/python-exercises/list/python-data-type-list-exercise-162.php" office:target-frame-name="_blank" xlink:show="new" text:style-name="Internet_20_link" text:visited-style-name="Visited_20_Internet_20_Link">Click me to see the sample solution</text:a></text:p>
      <text:p text:style-name="P5"><text:span text:style-name="Strong_20_Emphasis"><text:span text:style-name="T1">16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t the index of the first element that is greater than a specified element.<text:line-break/>Original list:<text:line-break/>[12, 45, 23, 67, 78, 90, 100, 76, 38, 62, 73, 29, 83]<text:line-break/>Index of the first element which is greater than 73 in the said list:<text:line-break/>4<text:line-break/>Index of the first element which is greater than 21 in the said list:<text:line-break/>1<text:line-break/>Index of the first element which is greater than 80 in the said list:<text:line-break/>5<text:line-break/>Index of the first element which is greater than 55 in the said list:<text:line-break/></text:span><text:soft-page-break/><text:span text:style-name="T1">3<text:line-break/></text:span><text:a xlink:type="simple" xlink:href="https://www.w3resource.com/python-exercises/list/python-data-type-list-exercise-163.php" office:target-frame-name="_blank" xlink:show="new" text:style-name="Internet_20_link" text:visited-style-name="Visited_20_Internet_20_Link">Click me to see the sample solution</text:a></text:p>
      <text:p text:style-name="P5"><text:span text:style-name="Strong_20_Emphasis"><text:span text:style-name="T1">16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t items from a given list with specific conditions.<text:line-break/>Original list:<text:line-break/>[12, 45, 23, 67, 78, 90, 45, 32, 100, 76, 38, 62, 73, 29, 83]<text:line-break/>Number of Items of the said list which are even and greater than 45<text:line-break/>5<text:line-break/></text:span><text:a xlink:type="simple" xlink:href="https://www.w3resource.com/python-exercises/list/python-data-type-list-exercise-164.php" office:target-frame-name="_blank" xlink:show="new" text:style-name="Internet_20_link" text:visited-style-name="Visited_20_Internet_20_Link">Click me to see the sample solution</text:a></text:p>
      <text:p text:style-name="P5"><text:span text:style-name="Strong_20_Emphasis"><text:span text:style-name="T1">16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plit a given list into specified-sized chunks.<text:line-break/>Original list:<text:line-break/>[12, 45, 23, 67, 78, 90, 45, 32, 100, 76, 38, 62, 73, 29, 83]<text:line-break/>Split the said list into equal size 3<text:line-break/>[[12, 45, 23], [67, 78, 90], [45, 32, 100], [76, 38, 62], [73, 29, 83]]<text:line-break/>Split the said list into equal size 4<text:line-break/>[[12, 45, 23, 67], [78, 90, 45, 32], [100, 76, 38, 62], [73, 29, 83]]<text:line-break/>Split the said list into equal size 5<text:line-break/>[[12, 45, 23, 67, 78], [90, 45, 32, 100, 76], [38, 62, 73, 29, 83]]<text:line-break/></text:span><text:a xlink:type="simple" xlink:href="https://www.w3resource.com/python-exercises/list/python-data-type-list-exercise-165.php" office:target-frame-name="_blank" xlink:show="new" text:style-name="Internet_20_link" text:visited-style-name="Visited_20_Internet_20_Link">Click me to see the sample solution</text:a></text:p>
      <text:p text:style-name="P5"><text:span text:style-name="Strong_20_Emphasis"><text:span text:style-name="T1">16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move the None value from a given list.<text:line-break/>Original list:<text:line-break/>[12, 0, None, 23, None, -55, 234, 89, None, 0, 6, -12]<text:line-break/>Remove None value from the said list:<text:line-break/>[12, 0, 23, -55, 234, 89, 0, 6, -12]<text:line-break/></text:span><text:a xlink:type="simple" xlink:href="https://www.w3resource.com/python-exercises/list/python-data-type-list-exercise-166.php" office:target-frame-name="_blank" xlink:show="new" text:style-name="Internet_20_link" text:visited-style-name="Visited_20_Internet_20_Link">Click me to see the sample solution</text:a></text:p>
      <text:p text:style-name="P5"><text:span text:style-name="Strong_20_Emphasis"><text:span text:style-name="T1">16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nvert a given list of strings into a list of lists.<text:line-break/>Original list of strings:<text:line-break/>['Red', 'Maroon', 'Yellow', 'Olive']<text:line-break/>Convert the said list of strings into list of lists:<text:line-break/>[['R', 'e', 'd'], ['M', 'a', 'r', 'o', 'o', 'n'], ['Y', 'e', 'l', 'l', 'o', 'w'], ['O', 'l', 'i', 'v', 'e']]<text:line-break/></text:span><text:a xlink:type="simple" xlink:href="https://www.w3resource.com/python-exercises/list/python-data-type-list-exercise-167.php" office:target-frame-name="_blank" xlink:show="new" text:style-name="Internet_20_link" text:visited-style-name="Visited_20_Internet_20_Link">Click me to see the sample solution</text:a></text:p>
      <text:p text:style-name="P5"><text:span text:style-name="Strong_20_Emphasis"><text:span text:style-name="T1">16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display vertically each element of a given list, list of lists.<text:line-break/>Original list:<text:line-break/>['a', 'b', 'c', 'd', 'e', 'f']<text:line-break/>Display each element vertically of the said list:<text:line-break/>a<text:line-break/>b<text:line-break/></text:span><text:soft-page-break/><text:span text:style-name="T1">c<text:line-break/>d<text:line-break/>e<text:line-break/>f<text:line-break/>Original list:<text:line-break/>[[1, 2, 5], [4, 5, 8], [7, 3, 6]]<text:line-break/>Display each element vertically of the said list of lists:<text:line-break/>1 4 7<text:line-break/>2 5 3<text:line-break/>5 8 6<text:line-break/></text:span><text:a xlink:type="simple" xlink:href="https://www.w3resource.com/python-exercises/list/python-data-type-list-exercise-168.php" office:target-frame-name="_blank" xlink:show="new" text:style-name="Internet_20_link" text:visited-style-name="Visited_20_Internet_20_Link">Click me to see the sample solution</text:a></text:p>
      <text:p text:style-name="P5"><text:span text:style-name="Strong_20_Emphasis"><text:span text:style-name="T1">16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nvert a given list of strings and characters to a single list of characters.<text:line-break/>Original list:<text:line-break/>['red', 'white', 'a', 'b', 'black', 'f']<text:line-break/>Convert the said list of strings and characters to a single list of characters:<text:line-break/>['r', 'e', 'd', 'w', 'h', 'i', 't', 'e', 'a', 'b', 'b', 'l', 'a', 'c', 'k', 'f']<text:line-break/></text:span><text:a xlink:type="simple" xlink:href="https://www.w3resource.com/python-exercises/list/python-data-type-list-exercise-169.php" office:target-frame-name="_blank" xlink:show="new" text:style-name="Internet_20_link" text:visited-style-name="Visited_20_Internet_20_Link">Click me to see the sample solution</text:a></text:p>
      <text:p text:style-name="P5"><text:span text:style-name="Strong_20_Emphasis"><text:span text:style-name="T1">17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insert an element in a given list after every nth position.<text:line-break/>Original list:<text:line-break/>[1, 2, 3, 4, 5, 6, 7, 8, 9, 0]<text:line-break/>Insert a in the said list after 2 nd element:<text:line-break/>[1, 2, 'a', 3, 4, 'a', 5, 6, 'a', 7, 8, 'a', 9, 0]<text:line-break/>Insert b in the said list after 4 th element:<text:line-break/>[1, 2, 3, 4, 'b', 5, 6, 7, 8, 'b', 9, 0]<text:line-break/></text:span><text:a xlink:type="simple" xlink:href="https://www.w3resource.com/python-exercises/list/python-data-type-list-exercise-170.php" office:target-frame-name="_blank" xlink:show="new" text:style-name="Internet_20_link" text:visited-style-name="Visited_20_Internet_20_Link">Click me to see the sample solution</text:a></text:p>
      <text:p text:style-name="P5"><text:span text:style-name="Strong_20_Emphasis"><text:span text:style-name="T1">17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ncatenate element-wise three given lists.<text:line-break/>Original lists:<text:line-break/>['0', '1', '2', '3', '4']<text:line-break/>['red', 'green', 'black', 'blue', 'white']<text:line-break/>['100', '200', '300', '400', '500']<text:line-break/>Concatenate element-wise three said lists:<text:line-break/>['0red100', '1green200', '2black300', '3blue400', '4white500']<text:line-break/></text:span><text:a xlink:type="simple" xlink:href="https://www.w3resource.com/python-exercises/list/python-data-type-list-exercise-171.php" office:target-frame-name="_blank" xlink:show="new" text:style-name="Internet_20_link" text:visited-style-name="Visited_20_Internet_20_Link">Click me to see the sample solution</text:a></text:p>
      <text:p text:style-name="P5"><text:span text:style-name="Strong_20_Emphasis"><text:span text:style-name="T1">17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move the last N number of elements from a given list.<text:line-break/>Original lists:<text:line-break/>[2, 3, 9, 8, 2, 0, 39, 84, 2, 2, 34, 2, 34, 5, 3, 5]<text:line-break/></text:span><text:soft-page-break/><text:span text:style-name="T1">Remove the last 3 elements from the said list:<text:line-break/>[2, 3, 9, 8, 2, 0, 39, 84, 2, 2, 34, 2, 34]<text:line-break/>Remove the last 5 elements from the said list:<text:line-break/>[2, 3, 9, 8, 2, 0, 39, 84, 2, 2, 34]<text:line-break/>Remove the last 1 element from the said list:<text:line-break/>[2, 3, 9, 8, 2, 0, 39, 84, 2, 2, 34, 2, 34, 5, 3]<text:line-break/></text:span><text:a xlink:type="simple" xlink:href="https://www.w3resource.com/python-exercises/list/python-data-type-list-exercise-172.php" office:target-frame-name="_blank" xlink:show="new" text:style-name="Internet_20_link" text:visited-style-name="Visited_20_Internet_20_Link">Click me to see the sample solution</text:a></text:p>
      <text:p text:style-name="P5"><text:span text:style-name="Strong_20_Emphasis"><text:span text:style-name="T1">17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merge some list items in a given list using the index value.<text:line-break/>Original lists:<text:line-break/>['a', 'b', 'c', 'd', 'e', 'f', 'g']<text:line-break/>Merge items from 2 to 4 in the said List:<text:line-break/>['a', 'b', 'cd', 'e', 'f', 'g']<text:line-break/>Merge items from 3 to 7 in the said List:<text:line-break/>['a', 'b', 'c', 'defg']<text:line-break/></text:span><text:a xlink:type="simple" xlink:href="https://www.w3resource.com/python-exercises/list/python-data-type-list-exercise-173.php" office:target-frame-name="_blank" xlink:show="new" text:style-name="Internet_20_link" text:visited-style-name="Visited_20_Internet_20_Link">Click me to see the sample solution</text:a></text:p>
      <text:p text:style-name="P5"><text:span text:style-name="Strong_20_Emphasis"><text:span text:style-name="T1">17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add a number to each element in a given list of numbers.<text:line-break/>Original lists:<text:line-break/>[3, 8, 9, 4, 5, 0, 5, 0, 3]<text:line-break/>Add 3 to each element in the said list:<text:line-break/>[6, 11, 12, 7, 8, 3, 8, 3, 6]<text:line-break/>Original lists:<text:line-break/>[3.2, 8, 9.9, 4.2, 5, 0.1, 5, 3.11, 0]<text:line-break/>Add 0.51 to each element in the said list:<text:line-break/>[3.71, 8.51, 10.41, 4.71, 5.51, 0.61, 5.51, 3.62, 0.51]<text:line-break/></text:span><text:a xlink:type="simple" xlink:href="https://www.w3resource.com/python-exercises/list/python-data-type-list-exercise-174.php" office:target-frame-name="_blank" xlink:show="new" text:style-name="Internet_20_link" text:visited-style-name="Visited_20_Internet_20_Link">Click me to see the sample solution</text:a></text:p>
      <text:p text:style-name="P5"><text:span text:style-name="Strong_20_Emphasis"><text:span text:style-name="T1">17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minimum and maximum value for each tuple position in a given list of tuples.<text:line-break/>Original list:<text:line-break/>[(2, 3), (2, 4), (0, 6), (7, 1)]<text:line-break/>Maximum value for each tuple position in the said list of tuples:<text:line-break/>[7, 6]<text:line-break/>Minimum value for each tuple position in the said list of tuples:<text:line-break/>[0, 1]<text:line-break/></text:span><text:a xlink:type="simple" xlink:href="https://www.w3resource.com/python-exercises/list/python-data-type-list-exercise-175.php" office:target-frame-name="_blank" xlink:show="new" text:style-name="Internet_20_link" text:visited-style-name="Visited_20_Internet_20_Link">Click me to see the sample solution</text:a></text:p>
      <text:p text:style-name="P5"><text:soft-page-break/><text:span text:style-name="Strong_20_Emphasis"><text:span text:style-name="T1">17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reate a new list by dividing two given lists of numbers.<text:line-break/>Original list:<text:line-break/>[7, 2, 3, 4, 9, 2, 3]<text:line-break/>[7, 2, 3, 4, 9, 2, 3]<text:line-break/>[0.7777777777777778, 0.25, 1.5, 1.3333333333333333, 3.0, 2.0, 1.5]<text:line-break/></text:span><text:a xlink:type="simple" xlink:href="https://www.w3resource.com/python-exercises/list/python-data-type-list-exercise-176.php" office:target-frame-name="_blank" xlink:show="new" text:style-name="Internet_20_link" text:visited-style-name="Visited_20_Internet_20_Link">Click me to see the sample solution</text:a></text:p>
      <text:p text:style-name="P5"><text:span text:style-name="Strong_20_Emphasis"><text:span text:style-name="T1">17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common elements in a given list of lists.<text:line-break/>Original list:<text:line-break/>[[7, 2, 3, 4, 7], [9, 2, 3, 2, 5], [8, 2, 3, 4, 4]]<text:line-break/>Common elements of the said list of lists:<text:line-break/>[2, 3]<text:line-break/>Original list:<text:line-break/>[['a', 'b', 'c'], ['b', 'c', 'd'], ['c', 'd', 'e']]<text:line-break/>Common elements of the said list of lists:<text:line-break/>['c']<text:line-break/></text:span><text:a xlink:type="simple" xlink:href="https://www.w3resource.com/python-exercises/list/python-data-type-list-exercise-177.php" office:target-frame-name="_blank" xlink:show="new" text:style-name="Internet_20_link" text:visited-style-name="Visited_20_Internet_20_Link">Click me to see the sample solution</text:a></text:p>
      <text:p text:style-name="P5"><text:span text:style-name="Strong_20_Emphasis"><text:span text:style-name="T1">17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insert a specified element in a given list after every nth element.<text:line-break/>Original list:<text:line-break/>[1, 3, 5, 7, 9, 11, 0, 2, 4, 6, 8, 10, 8, 9, 0, 4, 3, 0]<text:line-break/>Insert 20 in said list after every 4 th element:<text:line-break/>[1, 3, 5, 7, 20, 9, 11, 0, 2, 20, 4, 6, 8, 10, 20, 8, 9, 0, 4, 20, 3, 0]<text:line-break/>Original list:<text:line-break/>['s', 'd', 'f', 'j', 's', 'a', 'j', 'd', 'f', 'd']<text:line-break/>Insert Z in said list after every 3 th element:<text:line-break/>['s', 'd', 'f', 'Z', 'j', 's', 'a', 'Z', 'j', 'd', 'f', 'Z', 'd']<text:line-break/></text:span><text:a xlink:type="simple" xlink:href="https://www.w3resource.com/python-exercises/list/python-data-type-list-exercise-178.php" office:target-frame-name="_blank" xlink:show="new" text:style-name="Internet_20_link" text:visited-style-name="Visited_20_Internet_20_Link">Click me to see the sample solution</text:a></text:p>
      <text:p text:style-name="P5"><text:span text:style-name="Strong_20_Emphasis"><text:span text:style-name="T1">17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reate the largest possible number using the elements of a given list of positive integers.<text:line-break/>Original list:<text:line-break/>[3, 40, 41, 43, 74, 9]<text:line-break/>Largest possible number using the elements of the said list of positive integers:<text:line-break/>9744341403<text:line-break/>Original list:<text:line-break/>[10, 40, 20, 30, 50, 60]<text:line-break/>Largest possible number using the elements of the said list of positive integers:<text:line-break/>605040302010<text:line-break/></text:span><text:soft-page-break/><text:span text:style-name="T1">Original list:<text:line-break/>[8, 4, 2, 9, 5, 6, 1, 0]<text:line-break/>Largest possible number using the elements of the said list of positive integers:<text:line-break/>98654210<text:line-break/></text:span><text:a xlink:type="simple" xlink:href="https://www.w3resource.com/python-exercises/list/python-data-type-list-exercise-179.php" office:target-frame-name="_blank" xlink:show="new" text:style-name="Internet_20_link" text:visited-style-name="Visited_20_Internet_20_Link">Click me to see the sample solution</text:a></text:p>
      <text:p text:style-name="P5"><text:span text:style-name="Strong_20_Emphasis"><text:span text:style-name="T1">18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reate the smallest possible number using the elements of a given list of positive integers.<text:line-break/>Original list:<text:line-break/>[3, 40, 41, 43, 74, 9]<text:line-break/>Smallest possible number using the elements of the said list of positive integers:<text:line-break/>3404143749<text:line-break/>Original list:<text:line-break/>[10, 40, 20, 30, 50, 60]<text:line-break/>Smallest possible number using the elements of the said list of positive integers:<text:line-break/>102030405060<text:line-break/>Original list:<text:line-break/>[8, 4, 2, 9, 5, 6, 1, 0]<text:line-break/>Smallest possible number using the elements of the said list of positive integers:<text:line-break/>01245689<text:line-break/></text:span><text:a xlink:type="simple" xlink:href="https://www.w3resource.com/python-exercises/list/python-data-type-list-exercise-180.php" office:target-frame-name="_blank" xlink:show="new" text:style-name="Internet_20_link" text:visited-style-name="Visited_20_Internet_20_Link">Click me to see the sample solution</text:a></text:p>
      <text:p text:style-name="P5"><text:span text:style-name="Strong_20_Emphasis"><text:span text:style-name="T1">18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iterate a given list cyclically at a specific index position.<text:line-break/>Original list:<text:line-break/>['a', 'b', 'c', 'd', 'e', 'f', 'g', 'h']<text:line-break/>Iterate the said list cyclically on specific index position 3 :<text:line-break/>['d', 'e', 'f', 'g', 'h', 'a', 'b', 'c']<text:line-break/>Iterate the said list cyclically on specific index position 5 :<text:line-break/>['f', 'g', 'h', 'a', 'b', 'c', 'd', 'e']<text:line-break/></text:span><text:a xlink:type="simple" xlink:href="https://www.w3resource.com/python-exercises/list/python-data-type-list-exercise-181.php" office:target-frame-name="_blank" xlink:show="new" text:style-name="Internet_20_link" text:visited-style-name="Visited_20_Internet_20_Link">Click me to see the sample solution</text:a></text:p>
      <text:p text:style-name="P5"><text:span text:style-name="Strong_20_Emphasis"><text:span text:style-name="T1">18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alculate the maximum and minimum sum of a sublist in a given list of lists.<text:line-break/>Original list:<text:line-break/>[[1, 2, 3, 5], [2, 3, 5, 4], [0, 5, 4, 1], [3, 7, 2, 1], [1, 2, 1, 2]]<text:line-break/>Maximum sum of sub list of the said list of lists:<text:line-break/>[2, 3, 5, 4]<text:line-break/>Minimum sum of sub list of the said list of lists:<text:line-break/>[1, 2, 1, 2]<text:line-break/></text:span><text:a xlink:type="simple" xlink:href="https://www.w3resource.com/python-exercises/list/python-data-type-list-exercise-182.php" office:target-frame-name="_blank" xlink:show="new" text:style-name="Internet_20_link" text:visited-style-name="Visited_20_Internet_20_Link">Click me to see the sample solution</text:a></text:p>
      <text:p text:style-name="P5"><text:soft-page-break/><text:span text:style-name="Strong_20_Emphasis"><text:span text:style-name="T1">18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t the unique values in a given list of lists.<text:line-break/>Original list:<text:line-break/>[[1, 2, 3, 5], [2, 3, 5, 4], [0, 5, 4, 1], [3, 7, 2, 1], [1, 2, 1, 2]]<text:line-break/>Unique values of the said list of lists:<text:line-break/>[0, 1, 2, 3, 4, 5, 7]<text:line-break/>Original list:<text:line-break/>[['h', 'g', 'l', 'k'], ['a', 'b', 'd', 'e', 'c'], ['j', 'i', 'y'], ['n', 'b', 'v', 'c'], ['x', 'z']]<text:line-break/>Unique values of the said list of lists:<text:line-break/>['e', 'd', 'c', 'b', 'x', 'k', 'n', 'h', 'g', 'j', 'i', 'a', 'l', 'y', 'v', 'z']<text:line-break/></text:span><text:a xlink:type="simple" xlink:href="https://www.w3resource.com/python-exercises/list/python-data-type-list-exercise-183.php" office:target-frame-name="_blank" xlink:show="new" text:style-name="Internet_20_link" text:visited-style-name="Visited_20_Internet_20_Link">Click me to see the sample solution</text:a></text:p>
      <text:p text:style-name="P5"><text:span text:style-name="Strong_20_Emphasis"><text:span text:style-name="T1">18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nerate Bigrams of words from a given list of strings.<text:line-break/>From Wikipedia:<text:line-break/>A bigram or digram is a sequence of two adjacent elements from a string of tokens, which are typically letters, syllables, or words. A bigram is an n-gram for n=2. The frequency distribution of every bigram in a string is commonly used for simple statistical analysis of text in many applications, including in computational linguistics, cryptography, speech recognition, and so on.<text:line-break/>Original list:<text:line-break/>['Sum all the items in a list', 'Find the second smallest number in a list']<text:line-break/>Bigram sequence of the said list:<text:line-break/>[('Sum', 'all'), ('all', 'the'), ('the', 'items'), ('items', 'in'), ('in', 'a'), ('a', 'list'), ('Find', 'the'), ('the', 'second'), ('second', 'smallest'), ('smallest', 'number'), ('number', 'in'), ('in', 'a'), ('a', 'list')]<text:line-break/></text:span><text:a xlink:type="simple" xlink:href="https://www.w3resource.com/python-exercises/list/python-data-type-list-exercise-184.php" office:target-frame-name="_blank" xlink:show="new" text:style-name="Internet_20_link" text:visited-style-name="Visited_20_Internet_20_Link">Click me to see the sample solution</text:a></text:p>
      <text:p text:style-name="P5"><text:span text:style-name="Strong_20_Emphasis"><text:span text:style-name="T1">18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nvert a given decimal number to a binary list.<text:line-break/>Original Number: 8<text:line-break/>Decimal number ( 8 ) to binary list:<text:line-break/>[1, 0, 0, 0]<text:line-break/>Original Number: 45<text:line-break/>Decimal number ( 45 ) to binary list:<text:line-break/>[1, 0, 1, 1, 0, 1]<text:line-break/>Original Number: 100<text:line-break/>Decimal number ( 100 ) to binary list:<text:line-break/>[1, 1, 0, 0, 1, 0, 0]<text:line-break/></text:span><text:a xlink:type="simple" xlink:href="https://www.w3resource.com/python-exercises/list/python-data-type-list-exercise-185.php" office:target-frame-name="_blank" xlink:show="new" text:style-name="Internet_20_link" text:visited-style-name="Visited_20_Internet_20_Link">Click me to see the sample solution</text:a></text:p>
      <text:p text:style-name="P5"><text:span text:style-name="Strong_20_Emphasis"><text:span text:style-name="T1">18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wap two sublists in a given list.<text:line-break/>Original list:<text:line-break/></text:span><text:soft-page-break/><text:span text:style-name="T1">[0, 1, 2, 3, 4, 5, 6, 7, 8, 9, 10, 11, 12, 13, 14, 15]<text:line-break/>Swap two sublists of the said list:<text:line-break/>[0, 6, 7, 8, 9, 3, 4, 5, 1, 2, 10, 11, 12, 13, 14, 15]<text:line-break/>Swap two sublists of the said list:<text:line-break/>[0, 9, 3, 8, 6, 7, 4, 5, 1, 2, 10, 11, 12, 13, 14, 15]<text:line-break/></text:span><text:a xlink:type="simple" xlink:href="https://www.w3resource.com/python-exercises/list/python-data-type-list-exercise-186.php" office:target-frame-name="_blank" xlink:show="new" text:style-name="Internet_20_link" text:visited-style-name="Visited_20_Internet_20_Link">Click me to see the sample solution</text:a></text:p>
      <text:p text:style-name="P5"><text:span text:style-name="Strong_20_Emphasis"><text:span text:style-name="T1">18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nvert a given list of tuples to a list of strings.<text:line-break/>Original list of tuples:<text:line-break/>[('red', 'green'), ('black', 'white'), ('orange', 'pink')]<text:line-break/>Convert the said list of tuples to a list of strings:<text:line-break/>['red green', 'black white', 'orange pink']<text:line-break/>Original list of tuples:<text:line-break/>[('Laiba', 'Delacruz'), ('Mali', 'Stacey', 'Drummond'), ('Raja', 'Welch'), ('Saarah', 'Stone')]<text:line-break/>Convert the said list of tuples to a list of strings:<text:line-break/>['Laiba Delacruz', 'Mali Stacey Drummond', 'Raja Welch', 'Saarah Stone']<text:line-break/></text:span><text:a xlink:type="simple" xlink:href="https://www.w3resource.com/python-exercises/list/python-data-type-list-exercise-187.php" office:target-frame-name="_blank" xlink:show="new" text:style-name="Internet_20_link" text:visited-style-name="Visited_20_Internet_20_Link">Click me to see the sample solution</text:a></text:p>
      <text:p text:style-name="P5"><text:span text:style-name="Strong_20_Emphasis"><text:span text:style-name="T1">18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ort a given list of tuples by a specified element.<text:line-break/>Original list of tuples:<text:line-break/>[('item2', 10, 10.12), ('item3', 15, 25.1), ('item1', 11, 24.5), ('item4', 12, 22.5)]<text:line-break/>Sort on 1st element of the tuple of the said list:<text:line-break/>[('item1', 11, 24.5), ('item2', 10, 10.12), ('item3', 15, 25.1), ('item4', 12, 22.5)]<text:line-break/>Sort on 2nd element of the tuple of the said list:<text:line-break/>[('item2', 10, 10.12), ('item1', 11, 24.5), ('item4', 12, 22.5), ('item3', 15, 25.1)]<text:line-break/>Sort on 3rd element of the tuple of the said list:<text:line-break/>[('item2', 10, 10.12), ('item4', 12, 22.5), ('item1', 11, 24.5), ('item3', 15, 25.1)]<text:line-break/></text:span><text:a xlink:type="simple" xlink:href="https://www.w3resource.com/python-exercises/list/python-data-type-list-exercise-188.php" office:target-frame-name="_blank" xlink:show="new" text:style-name="Internet_20_link" text:visited-style-name="Visited_20_Internet_20_Link">Click me to see the sample solution</text:a></text:p>
      <text:p text:style-name="P5"><text:span text:style-name="Strong_20_Emphasis"><text:span text:style-name="T1">18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hift last element to first position and first element to last position in a given list.<text:line-break/>Original list:<text:line-break/>[1, 2, 3, 4, 5, 6, 7]<text:line-break/>Shift last element to first position and first element to last position of the said list:<text:line-break/>[7, 2, 3, 4, 5, 6, 1]<text:line-break/>Original list:<text:line-break/>['s', 'd', 'f', 'd', 's', 's', 'd', 'f']<text:line-break/>Shift last element to first position and first element to last position of the said list:<text:line-break/>['f', 'd', 'f', 'd', 's', 's', 'd', 's']<text:line-break/></text:span><text:a xlink:type="simple" xlink:href="https://www.w3resource.com/python-exercises/list/python-data-type-list-exercise-189.php" office:target-frame-name="_blank" xlink:show="new" text:style-name="Internet_20_link" text:visited-style-name="Visited_20_Internet_20_Link">Click me to see the sample solution</text:a></text:p>
      <text:p text:style-name="P5"><text:soft-page-break/><text:span text:style-name="Strong_20_Emphasis"><text:span text:style-name="T1">19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specified number of largest products from two given lists, multiplying an element from each list.<text:line-break/>Original lists:<text:line-break/>[1, 2, 3, 4, 5, 6]<text:line-break/>[3, 6, 8, 9, 10, 6]<text:line-break/>3 Number of largest products from the said two lists:<text:line-break/>[60, 54, 50]<text:line-break/>4 Number of largest products from the said two lists:<text:line-break/>[60, 54, 50, 48]<text:line-break/></text:span><text:a xlink:type="simple" xlink:href="https://www.w3resource.com/python-exercises/list/python-data-type-list-exercise-190.php" office:target-frame-name="_blank" xlink:show="new" text:style-name="Internet_20_link" text:visited-style-name="Visited_20_Internet_20_Link">Click me to see the sample solution</text:a></text:p>
      <text:p text:style-name="P5"><text:span text:style-name="Strong_20_Emphasis"><text:span text:style-name="T1">19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maximum and minimum values of the three given lists.<text:line-break/>Original lists:<text:line-break/>[2, 3, 5, 8, 7, 2, 3]<text:line-break/>[4, 3, 9, 0, 4, 3, 9]<text:line-break/>[2, 1, 5, 6, 5, 5, 4]<text:line-break/>Maximum value of the said three lists:<text:line-break/>9<text:line-break/>Minimum value of the said three lists:<text:line-break/>0<text:line-break/></text:span><text:a xlink:type="simple" xlink:href="https://www.w3resource.com/python-exercises/list/python-data-type-list-exercise-191.php" office:target-frame-name="_blank" xlink:show="new" text:style-name="Internet_20_link" text:visited-style-name="Visited_20_Internet_20_Link">Click me to see the sample solution</text:a></text:p>
      <text:p text:style-name="P5"><text:span text:style-name="Strong_20_Emphasis"><text:span text:style-name="T1">19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move all strings from a given list of tuples.<text:line-break/>Original list:<text:line-break/>[(100, 'Math'), (80, 'Math'), (90, 'Math'), (88, 'Science', 89), (90, 'Science', 92)]<text:line-break/>Remove all strings from the said list of tuples:<text:line-break/>[(100,), (80,), (90,), (88, 89), (90, 92)]<text:line-break/></text:span><text:a xlink:type="simple" xlink:href="https://www.w3resource.com/python-exercises/list/python-data-type-list-exercise-192.php" office:target-frame-name="_blank" xlink:show="new" text:style-name="Internet_20_link" text:visited-style-name="Visited_20_Internet_20_Link">Click me to see the sample solution</text:a></text:p>
      <text:p text:style-name="P5"><text:span text:style-name="Strong_20_Emphasis"><text:span text:style-name="T1">19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dimension of a given matrix.<text:line-break/>Original list:<text:line-break/>[[1, 2], [2, 4]]<text:line-break/>Dimension of the said matrix:<text:line-break/>(2, 2)<text:line-break/>Original list:<text:line-break/>[[0, 1, 2], [2, 4, 5]]<text:line-break/>Dimension of the said matrix:<text:line-break/>(2, 3)<text:line-break/>Original list:<text:line-break/></text:span><text:soft-page-break/><text:span text:style-name="T1">[[0, 1, 2], [2, 4, 5], [2, 3, 4]]<text:line-break/>Dimension of the said matrix:<text:line-break/>(3, 3)<text:line-break/></text:span><text:a xlink:type="simple" xlink:href="https://www.w3resource.com/python-exercises/list/python-data-type-list-exercise-193.php" office:target-frame-name="_blank" xlink:show="new" text:style-name="Internet_20_link" text:visited-style-name="Visited_20_Internet_20_Link">Click me to see the sample solution</text:a></text:p>
      <text:p text:style-name="P5"><text:span text:style-name="Strong_20_Emphasis"><text:span text:style-name="T1">19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um two or more lists. The lengths of the lists may be different.<text:line-break/>Original list:<text:line-break/>[[1, 2, 4], [2, 4, 4], [1, 2]]<text:line-break/>Sum said lists with different lengths:<text:line-break/>[4, 8, 8]<text:line-break/>Original list:<text:line-break/>[[1], [2, 4, 4], [1, 2], [4]]<text:line-break/>Sum said lists with different lengths:<text:line-break/>[8, 6, 4]<text:line-break/></text:span><text:a xlink:type="simple" xlink:href="https://www.w3resource.com/python-exercises/list/python-data-type-list-exercise-194.php" office:target-frame-name="_blank" xlink:show="new" text:style-name="Internet_20_link" text:visited-style-name="Visited_20_Internet_20_Link">Click me to see the sample solution</text:a></text:p>
      <text:p text:style-name="P5"><text:span text:style-name="Strong_20_Emphasis"><text:span text:style-name="T1">19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traverse a given list in reverse order, and print the elements with the original index.<text:line-break/>Original list:<text:line-break/>['red', 'green', 'white', 'black']<text:line-break/>Traverse the said list in reverse order:<text:line-break/>black<text:line-break/>white<text:line-break/>green<text:line-break/>red<text:line-break/>Traverse the said list in reverse order with original index:<text:line-break/>3 black<text:line-break/>2 white<text:line-break/>1 green<text:line-break/>0 red<text:line-break/></text:span><text:a xlink:type="simple" xlink:href="https://www.w3resource.com/python-exercises/list/python-data-type-list-exercise-195.php" office:target-frame-name="_blank" xlink:show="new" text:style-name="Internet_20_link" text:visited-style-name="Visited_20_Internet_20_Link">Click me to see the sample solution</text:a></text:p>
      <text:p text:style-name="P5"><text:span text:style-name="Strong_20_Emphasis"><text:span text:style-name="T1">19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move a specified element in a given list.<text:line-break/>Original list:<text:line-break/>['red', 'green', 'white', 'black', 'orange']<text:line-break/>Move white at the end of the said list:<text:line-break/>['red', 'green', 'black', 'orange', 'white']<text:line-break/>Original list:<text:line-break/>['red', 'green', 'white', 'black', 'orange']<text:line-break/></text:span><text:soft-page-break/><text:span text:style-name="T1">Move red at the end of the said list:<text:line-break/>['green', 'white', 'black', 'orange', 'red']<text:line-break/>Original list:<text:line-break/>['red', 'green', 'white', 'black', 'orange']<text:line-break/>Move black at the end of the said list:<text:line-break/>['red', 'green', 'white', 'orange', 'black']<text:line-break/></text:span><text:a xlink:type="simple" xlink:href="https://www.w3resource.com/python-exercises/list/python-data-type-list-exercise-196.php" office:target-frame-name="_blank" xlink:show="new" text:style-name="Internet_20_link" text:visited-style-name="Visited_20_Internet_20_Link">Click me to see the sample solution</text:a></text:p>
      <text:p text:style-name="P5"><text:span text:style-name="Strong_20_Emphasis"><text:span text:style-name="T1">19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mpute the average of the n-th element in a given list of lists with different lengths.<text:line-break/>Original list:<text:line-break/>[[0, 1, 2], [2, 3, 4], [3, 4, 5, 6], [7, 8, 9, 10, 11], [12, 13, 14]]<text:line-break/>Average of n-th elements in the said list of lists with different lengths:<text:line-break/>[4.8, 5.8, 6.8, 8.0, 11.0]<text:line-break/></text:span><text:a xlink:type="simple" xlink:href="https://www.w3resource.com/python-exercises/list/python-data-type-list-exercise-197.php" office:target-frame-name="_blank" xlink:show="new" text:style-name="Internet_20_link" text:visited-style-name="Visited_20_Internet_20_Link">Click me to see the sample solution</text:a></text:p>
      <text:p text:style-name="P5"><text:span text:style-name="Strong_20_Emphasis"><text:span text:style-name="T1">19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mpare two given lists and find the indices of the values present in both lists.<text:line-break/>Original lists:<text:line-break/>[1, 2, 3, 4, 5, 6]<text:line-break/>[7, 8, 5, 2, 10, 12]<text:line-break/>Compare said two lists and get the indices of the values present in both lists:<text:line-break/>[1, 4]<text:line-break/>Original lists:<text:line-break/>[1, 2, 3, 4, 5, 6]<text:line-break/>[7, 8, 5, 7, 10, 12]<text:line-break/>Compare said two lists and get the indices of the values present in both lists:<text:line-break/>[4]<text:line-break/>Original lists:<text:line-break/>[1, 2, 3, 4, 15, 6]<text:line-break/>[7, 8, 5, 7, 10, 12]<text:line-break/>Compare said two lists and get the indices of the values present in both lists:<text:line-break/>[]<text:line-break/></text:span><text:a xlink:type="simple" xlink:href="https://www.w3resource.com/python-exercises/list/python-data-type-list-exercise-198.php" office:target-frame-name="_blank" xlink:show="new" text:style-name="Internet_20_link" text:visited-style-name="Visited_20_Internet_20_Link">Click me to see the sample solution</text:a></text:p>
      <text:p text:style-name="P5"><text:span text:style-name="Strong_20_Emphasis"><text:span text:style-name="T1">19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nvert a Unicode list to a list of strings.<text:line-break/>Original lists:<text:line-break/>['S001', 'S002', 'S003', 'S004']<text:line-break/>Convert the said unicode list to a list contains strings:<text:line-break/></text:span><text:soft-page-break/><text:span text:style-name="T1">['S001', 'S002', 'S003', 'S004']<text:line-break/></text:span><text:a xlink:type="simple" xlink:href="https://www.w3resource.com/python-exercises/list/python-data-type-list-exercise-199.php" office:target-frame-name="_blank" xlink:show="new" text:style-name="Internet_20_link" text:visited-style-name="Visited_20_Internet_20_Link">Click me to see the sample solution</text:a></text:p>
      <text:p text:style-name="P5"><text:span text:style-name="Strong_20_Emphasis"><text:span text:style-name="T1">20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pair consecutive elements of a given list.<text:line-break/>Original lists:<text:line-break/>[1, 2, 3, 4, 5, 6]<text:line-break/>Pair up the consecutive elements of the said list:<text:line-break/>[[1, 2], [2, 3], [3, 4], [4, 5], [5, 6]]<text:line-break/>Original lists:<text:line-break/>[1, 2, 3, 4, 5]<text:line-break/>Pair up the consecutive elements of the said list:<text:line-break/>[[1, 2], [2, 3], [3, 4], [4, 5]]<text:line-break/></text:span><text:a xlink:type="simple" xlink:href="https://www.w3resource.com/python-exercises/list/python-data-type-list-exercise-200.php" office:target-frame-name="_blank" xlink:show="new" text:style-name="Internet_20_link" text:visited-style-name="Visited_20_Internet_20_Link">Click me to see the sample solution</text:a></text:p>
      <text:p text:style-name="P5"><text:span text:style-name="Strong_20_Emphasis"><text:span text:style-name="T1">20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eck if a given string contains an element that is present in a list.<text:line-break/>The original string and list:<text:line-break/>https://www.w3resource.com/python-exercises/list/<text:line-break/>['.com', '.edu', '.tv']<text:line-break/>Check if https://www.w3resource.com/python-exercises/list/ contains an element, which is present in the list ['.com', '.edu', '.tv']<text:line-break/>True<text:line-break/>The original string and list: https://www.w3resource.net<text:line-break/>https://www.w3resource.net<text:line-break/>['.com', '.edu', '.tv']<text:line-break/>Check if https://www.w3resource.net contains an element, which is present in the list ['.com', '.edu', '.tv']<text:line-break/>False<text:line-break/></text:span><text:a xlink:type="simple" xlink:href="https://www.w3resource.com/python-exercises/list/python-data-type-list-exercise-201.php" office:target-frame-name="_blank" xlink:show="new" text:style-name="Internet_20_link" text:visited-style-name="Visited_20_Internet_20_Link">Click me to see the sample solution</text:a></text:p>
      <text:p text:style-name="P5"><text:span text:style-name="Strong_20_Emphasis"><text:span text:style-name="T1">20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indexes of all None items in a given list.<text:line-break/>Original list:<text:line-break/>[1, None, 5, 4, None, 0, None, None]<text:line-break/>Indexes of all None items of the list:<text:line-break/>[1, 4, 6, 7]<text:line-break/></text:span><text:a xlink:type="simple" xlink:href="https://www.w3resource.com/python-exercises/list/python-data-type-list-exercise-202.php" office:target-frame-name="_blank" xlink:show="new" text:style-name="Internet_20_link" text:visited-style-name="Visited_20_Internet_20_Link">Click me to see the sample solution</text:a></text:p>
      <text:p text:style-name="P5"><text:span text:style-name="Strong_20_Emphasis"><text:span text:style-name="T1">20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join adjacent members of a given list.<text:line-break/>Original list:<text:line-break/>['1', '2', '3', '4', '5', '6', '7', '8']<text:line-break/>Join adjacent members of a given list:<text:line-break/></text:span><text:soft-page-break/><text:span text:style-name="T1">['12', '34', '56', '78']<text:line-break/>Original list:<text:line-break/>['1', '2', '3']<text:line-break/>Join adjacent members of a given list:<text:line-break/>['12']<text:line-break/></text:span><text:a xlink:type="simple" xlink:href="https://www.w3resource.com/python-exercises/list/python-data-type-list-exercise-203.php" office:target-frame-name="_blank" xlink:show="new" text:style-name="Internet_20_link" text:visited-style-name="Visited_20_Internet_20_Link">Click me to see the sample solution</text:a></text:p>
      <text:p text:style-name="P4"><text:span text:style-name="Strong_20_Emphasis"><text:span text:style-name="T1">204.</text:span></text:span><text:span text:style-name="T1"> Write a Python program to check if the first digit or character of each element in a list is the same.<text:line-break/>Original list:<text:line-break/>[1234, 122, 1984, 19372, 100]<text:line-break/>Check if first digit in each element of the said given list is same or not!<text:line-break/>True<text:line-break/>Original list:<text:line-break/>[1234, 922, 1984, 19372, 100]<text:line-break/>Check if first digit in each element of the said given list is same or not!<text:line-break/>False<text:line-break/>Original list:<text:line-break/>['aabc', 'abc', 'ab', 'a']<text:line-break/>Check if first character in each element of the said given list is same or not!<text:line-break/>True<text:line-break/>Original list:<text:line-break/>['aabc', 'abc', 'ab', 'ha']<text:line-break/>Check if first character in each element of the said given list is same or not!<text:line-break/>False<text:line-break/></text:span><text:a xlink:type="simple" xlink:href="https://www.w3resource.com/python-exercises/list/python-data-type-list-exercise-204.php" office:target-frame-name="_blank" xlink:show="new" text:style-name="Internet_20_link" text:visited-style-name="Visited_20_Internet_20_Link">Click me to see the sample solution</text:a></text:p>
      <text:p text:style-name="P5"><text:span text:style-name="Strong_20_Emphasis"><text:span text:style-name="T1">20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indices of elements in a given list that are greater than a specified value.<text:line-break/>Original list:<text:line-break/>[1234, 1522, 1984, 19372, 1000, 2342, 7626]<text:line-break/>Indices of elements of the said list, greater than 3000<text:line-break/>[3, 6]<text:line-break/>Original list:<text:line-break/>[1234, 1522, 1984, 19372, 1000, 2342, 7626]<text:line-break/>Indices of elements of the said list, greater than 20000<text:line-break/>[]<text:line-break/></text:span><text:a xlink:type="simple" xlink:href="https://www.w3resource.com/python-exercises/list/python-data-type-list-exercise-205.php" office:target-frame-name="_blank" xlink:show="new" text:style-name="Internet_20_link" text:visited-style-name="Visited_20_Internet_20_Link">Click me to see the sample solution</text:a></text:p>
      <text:p text:style-name="P5"><text:soft-page-break/><text:span text:style-name="Strong_20_Emphasis"><text:span text:style-name="T1">20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move additional spaces from a given list.<text:line-break/>Original list:<text:line-break/>['abc ', ' ', ' ', 'sdfds ', ' ', ' ', 'sdfds ', 'huy']<text:line-break/>Remove additional spaces from the said list:<text:line-break/>['abc', '', '', 'sdfds', '', '', 'sdfds', 'huy']<text:line-break/></text:span><text:a xlink:type="simple" xlink:href="https://www.w3resource.com/python-exercises/list/python-data-type-list-exercise-206.php" office:target-frame-name="_blank" xlink:show="new" text:style-name="Internet_20_link" text:visited-style-name="Visited_20_Internet_20_Link">Click me to see the sample solution</text:a></text:p>
      <text:p text:style-name="P5"><text:span text:style-name="Strong_20_Emphasis"><text:span text:style-name="T1">20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common tuples between two given lists.<text:line-break/>Original lists:<text:line-break/>[('red', 'green'), ('black', 'white'), ('orange', 'pink')]<text:line-break/>[('red', 'green'), ('orange', 'pink')]<text:line-break/>Common tuples between two said lists<text:line-break/>[('orange', 'pink'), ('red', 'green')]<text:line-break/>Original lists:<text:line-break/>[('red', 'green'), ('orange', 'pink')]<text:line-break/>[('red', 'green'), ('black', 'white'), ('orange', 'pink')]<text:line-break/>Common tuples between two said lists<text:line-break/>[('orange', 'pink'), ('red', 'green')]<text:line-break/></text:span><text:a xlink:type="simple" xlink:href="https://www.w3resource.com/python-exercises/list/python-data-type-list-exercise-207.php" office:target-frame-name="_blank" xlink:show="new" text:style-name="Internet_20_link" text:visited-style-name="Visited_20_Internet_20_Link">Click me to see the sample solution</text:a></text:p>
      <text:p text:style-name="P5"><text:span text:style-name="Strong_20_Emphasis"><text:span text:style-name="T1">208.</text:span></text:span><text:span text:style-name="T1"> Sum a list of numbers. Write a </text:span><text:a xlink:type="simple" xlink:href="https://www.w3resource.com/python-exercises/list/#" text:style-name="Internet_20_link" text:visited-style-name="Visited_20_Internet_20_Link"> <text:span text:style-name="T2">Python</text:span></text:a><text:span text:style-name="T1"> program to sum the first number with the second and divide it by 2, then sum the second with the third and divide by 2, and so on.<text:line-break/>Original list:<text:line-break/>[1, 2, 3, 4, 5, 6, 7]<text:line-break/>Sum the said list of numbers:<text:line-break/>[1.5, 2.5, 3.5, 4.5, 5.5, 6.5]<text:line-break/>Original list:<text:line-break/>[0, 1, -3, 3, 7, -5, 6, 7, 11]<text:line-break/>Sum the said list of numbers:<text:line-break/>[0.5, -1.0, 0.0, 5.0, 1.0, 0.5, 6.5, 9.0]<text:line-break/></text:span><text:a xlink:type="simple" xlink:href="https://www.w3resource.com/python-exercises/list/python-data-type-list-exercise-208.php" office:target-frame-name="_blank" xlink:show="new" text:style-name="Internet_20_link" text:visited-style-name="Visited_20_Internet_20_Link">Click me to see the sample solution</text:a></text:p>
      <text:p text:style-name="P5"><text:span text:style-name="Strong_20_Emphasis"><text:span text:style-name="T1">20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unt the number of groups of non-zero numbers separated by zeros in a given list of numbers.<text:line-break/>Original list:<text:line-break/>[3, 4, 6, 2, 0, 0, 0, 0, 0, 0, 6, 7, 6, 9, 10, 0, 0, 0, 0, 0, 5, 9, 9, 7, 4, 4, 0, 0, 0, 0, 0, 0, 5, 3, 2, 9, 7, 1]<text:line-break/>Number of groups of non-zero numbers separated by zeros of the said list: 4<text:line-break/></text:span><text:a xlink:type="simple" xlink:href="https://www.w3resource.com/python-exercises/list/python-data-type-list-exercise-209.php" office:target-frame-name="_blank" xlink:show="new" text:style-name="Internet_20_link" text:visited-style-name="Visited_20_Internet_20_Link">Click me to see the sample solution</text:a></text:p>
      <text:p text:style-name="P5"><text:soft-page-break/><text:span text:style-name="Strong_20_Emphasis"><text:span text:style-name="T1">21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mpute the sum of non-zero groups (separated by zeros) of a given list of numbers.<text:line-break/>Original list:<text:line-break/>[3, 4, 6, 2, 0, 0, 0, 0, 0, 0, 6, 7, 6, 9, 10, 0, 0, 0, 0, 0, 7, 4, 4, 0, 0, 0, 0, 0, 0, 5, 3, 2, 9, 7, 1, 0, 0, 0]<text:line-break/>Compute the sum of non-zero groups (separated by zeros) of the said list of numbers: [15, 38, 15, 27]<text:line-break/></text:span><text:a xlink:type="simple" xlink:href="https://www.w3resource.com/python-exercises/list/python-data-type-list-exercise-210.php" office:target-frame-name="_blank" xlink:show="new" text:style-name="Internet_20_link" text:visited-style-name="Visited_20_Internet_20_Link">Click me to see the sample solution</text:a></text:p>
      <text:p text:style-name="P5"><text:span text:style-name="Strong_20_Emphasis"><text:span text:style-name="T1">21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move an element from a given list.<text:line-break/>Original list:<text:line-break/>['Ricky Rivera', 98, 'Math', 90, 'Science']<text:line-break/>After deleting an element:, using index of the element: [98, 'Math', 90, 'Science']<text:line-break/></text:span><text:a xlink:type="simple" xlink:href="https://www.w3resource.com/python-exercises/list/python-data-type-list-exercise-211.php" office:target-frame-name="_blank" xlink:show="new" text:style-name="Internet_20_link" text:visited-style-name="Visited_20_Internet_20_Link">Click me to see the sample solution</text:a></text:p>
      <text:p text:style-name="P5"><text:span text:style-name="Strong_20_Emphasis"><text:span text:style-name="T1">21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move all values except integer values from a given array of mixed values.<text:line-break/>Original list: [34.67, 12, -94.89, 'Python', 0, 'C#']<text:line-break/>After removing all the values except integer values from the said array of mixed values: [12, 0]<text:line-break/></text:span><text:a xlink:type="simple" xlink:href="https://www.w3resource.com/python-exercises/list/python-data-type-list-exercise-212.php" office:target-frame-name="_blank" xlink:show="new" text:style-name="Internet_20_link" text:visited-style-name="Visited_20_Internet_20_Link">Click me to see the sample solution</text:a></text:p>
      <text:p text:style-name="P4"><text:span text:style-name="Strong_20_Emphasis"><text:span text:style-name="T1">213.</text:span></text:span><text:span text:style-name="T1"> Write a Python program to calculate the sum of two lowest negative numbers in a given array of integers.<text:line-break/>An integer (from the Latin integer meaning "whole") is colloquially defined as a number that can be written without a fractional component. For example, 21, 4, 0, and -2048 are integers.<text:line-break/>Original list elements: [-14, 15, -10, -11, -12, -13, 16, 17, 18, 19, 20]<text:line-break/>Sum of two lowest negative numbers of the said array of integers: -27<text:line-break/>Original list elements: [-4, 5, -2, 0, 3, -1, 4, 9]<text:line-break/>Sum of two lowest negative numbers of the said array of integers: -6<text:line-break/></text:span><text:a xlink:type="simple" xlink:href="https://www.w3resource.com/python-exercises/list/python-data-type-list-exercise-213.php" office:target-frame-name="_blank" xlink:show="new" text:style-name="Internet_20_link" text:visited-style-name="Visited_20_Internet_20_Link">Click me to see the sample solution</text:a></text:p>
      <text:p text:style-name="P5"><text:span text:style-name="Strong_20_Emphasis"><text:span text:style-name="T1">21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ort a given positive number in descending/ascending order.<text:line-break/>Descending -&gt; Highest to lowest.<text:line-break/>Ascending -&gt; Lowest to highest<text:line-break/>Original Number: 134543<text:line-break/>Descending order of the said number: 544331<text:line-break/>Ascending order of the said number: 133445<text:line-break/>Original Number: 43750973<text:line-break/></text:span><text:soft-page-break/><text:span text:style-name="T1">Descending order of the said number: 97754330<text:line-break/>Ascending order of the said number: 3345779<text:line-break/></text:span><text:a xlink:type="simple" xlink:href="https://www.w3resource.com/python-exercises/list/python-data-type-list-exercise-214.php" office:target-frame-name="_blank" xlink:show="new" text:style-name="Internet_20_link" text:visited-style-name="Visited_20_Internet_20_Link">Click me to see the sample solution</text:a></text:p>
      <text:p text:style-name="P5"><text:span text:style-name="Strong_20_Emphasis"><text:span text:style-name="T1">21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merge two or more lists into a list of lists, combining elements from each of the input lists based on their positions.<text:line-break/>Sample Output:<text:line-break/>After merging lists into a list of lists:<text:line-break/>[['a', 1, True], ['b', 2, False]]<text:line-break/>[['a', 1, True], [None, 2, False]]<text:line-break/>[['a', 1, True], ['_', 2, False]]<text:line-break/></text:span><text:a xlink:type="simple" xlink:href="https://www.w3resource.com/python-exercises/list/python-data-type-list-exercise-215.php" office:target-frame-name="_blank" xlink:show="new" text:style-name="Internet_20_link" text:visited-style-name="Visited_20_Internet_20_Link">Click me to see the sample solution</text:a></text:p>
      <text:p text:style-name="P5"><text:span text:style-name="Strong_20_Emphasis"><text:span text:style-name="T1">21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roup the elements of a list based on the given function and return the count of elements in each group.<text:line-break/>Sample Output:<text:line-break/>{6: 2, 4: 1}<text:line-break/>{3: 2, 5: 1}<text:line-break/></text:span><text:a xlink:type="simple" xlink:href="https://www.w3resource.com/python-exercises/list/python-data-type-list-exercise-216.php" office:target-frame-name="_blank" xlink:show="new" text:style-name="Internet_20_link" text:visited-style-name="Visited_20_Internet_20_Link">Click me to see the sample solution</text:a></text:p>
      <text:p text:style-name="P4"><text:span text:style-name="Strong_20_Emphasis"><text:span text:style-name="T1">217.</text:span></text:span><text:span text:style-name="T1"> Write a Python program to split values into two groups, based on the result of the given filtering function.<text:line-break/>Sample Output:<text:line-break/>[['white'], ['red', 'green', 'black']]<text:line-break/></text:span><text:a xlink:type="simple" xlink:href="https://www.w3resource.com/python-exercises/list/python-data-type-list-exercise-217.php" office:target-frame-name="_blank" xlink:show="new" text:style-name="Internet_20_link" text:visited-style-name="Visited_20_Internet_20_Link">Click me to see the sample solution</text:a></text:p>
      <text:p text:style-name="P5"><text:span text:style-name="Strong_20_Emphasis"><text:span text:style-name="T1">21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sort one list based on another list containing the desired indexes.<text:line-break/>Sample Output:<text:line-break/>['apples', 'bread', 'eggs', 'jam', 'milk', 'oranges']<text:line-break/>['oranges', 'milk', 'jam', 'eggs', 'bread', 'apples']<text:line-break/></text:span><text:a xlink:type="simple" xlink:href="https://www.w3resource.com/python-exercises/list/python-data-type-list-exercise-218.php" office:target-frame-name="_blank" xlink:show="new" text:style-name="Internet_20_link" text:visited-style-name="Visited_20_Internet_20_Link">Click me to see the sample solution</text:a></text:p>
      <text:p text:style-name="P4"><text:span text:style-name="Strong_20_Emphasis"><text:span text:style-name="T1">219.</text:span></text:span><text:span text:style-name="T1"> Write a Python program to build a list, using an iterator function and an initial seed value.<text:line-break/>Sample Output:<text:line-break/>[-10, -20, -30, -40]<text:line-break/></text:span><text:a xlink:type="simple" xlink:href="https://www.w3resource.com/python-exercises/list/python-data-type-list-exercise-219.php" office:target-frame-name="_blank" xlink:show="new" text:style-name="Internet_20_link" text:visited-style-name="Visited_20_Internet_20_Link">Click me to see the sample solution</text:a></text:p>
      <text:p text:style-name="P5"><text:span text:style-name="Strong_20_Emphasis"><text:span text:style-name="T1">22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map the values of a list to a dictionary using a function, where the key-value pairs consist of the original value as the key and the result of the function as the value.<text:line-break/></text:span><text:soft-page-break/><text:span text:style-name="T1">Sample Output:<text:line-break/>{1: 1, 2: 4, 3: 9}<text:line-break/></text:span><text:a xlink:type="simple" xlink:href="https://www.w3resource.com/python-exercises/list/python-data-type-list-exercise-220.php" office:target-frame-name="_blank" xlink:show="new" text:style-name="Internet_20_link" text:visited-style-name="Visited_20_Internet_20_Link">Click me to see the sample solution</text:a></text:p>
      <text:p text:style-name="P5"><text:span text:style-name="Strong_20_Emphasis"><text:span text:style-name="T1">22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andomize the order of the values of a list, returning a new list.<text:line-break/>Sample Output:<text:line-break/>Original list: [1, 2, 3, 4, 5, 6]<text:line-break/>Shuffle the elements of the said list:<text:line-break/>[3, 2, 4, 1, 6, 5]<text:line-break/></text:span><text:a xlink:type="simple" xlink:href="https://www.w3resource.com/python-exercises/list/python-data-type-list-exercise-221.php" office:target-frame-name="_blank" xlink:show="new" text:style-name="Internet_20_link" text:visited-style-name="Visited_20_Internet_20_Link">Click me to see the sample solution</text:a></text:p>
      <text:p text:style-name="P4"><text:span text:style-name="Strong_20_Emphasis"><text:span text:style-name="T1">222.</text:span></text:span><text:span text:style-name="T1"> Write a Python program to get the difference between two given lists, after applying the provided function to each list element of both.<text:line-break/>Sample Output:<text:line-break/>[1.2]<text:line-break/>[{'x': 2}]<text:line-break/></text:span><text:a xlink:type="simple" xlink:href="https://www.w3resource.com/python-exercises/list/python-data-type-list-exercise-222.php" office:target-frame-name="_blank" xlink:show="new" text:style-name="Internet_20_link" text:visited-style-name="Visited_20_Internet_20_Link">Click me to see the sample solution</text:a></text:p>
      <text:p text:style-name="P5"><text:span text:style-name="Strong_20_Emphasis"><text:span text:style-name="T1">22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reate a list with non-unique values filtered out.<text:line-break/>Sample Output:<text:line-break/>[1, 3, 5]<text:line-break/></text:span><text:a xlink:type="simple" xlink:href="https://www.w3resource.com/python-exercises/list/python-data-type-list-exercise-223.php" office:target-frame-name="_blank" xlink:show="new" text:style-name="Internet_20_link" text:visited-style-name="Visited_20_Internet_20_Link">Click me to see the sample solution</text:a></text:p>
      <text:p text:style-name="P4"><text:span text:style-name="Strong_20_Emphasis"><text:span text:style-name="T1">224.</text:span></text:span><text:span text:style-name="T1"> Write a Python program to create a list with unique values filtered out.<text:line-break/>Sample Output:<text:line-break/>[2, 4]<text:line-break/></text:span><text:a xlink:type="simple" xlink:href="https://www.w3resource.com/python-exercises/list/python-data-type-list-exercise-224.php" office:target-frame-name="_blank" xlink:show="new" text:style-name="Internet_20_link" text:visited-style-name="Visited_20_Internet_20_Link">Click me to see the sample solution</text:a></text:p>
      <text:p text:style-name="P5"><text:span text:style-name="Strong_20_Emphasis"><text:span text:style-name="T1">22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retrieve the value of the nested key indicated by the given selector list from a dictionary or list.<text:line-break/>Sample Output:<text:line-break/>Harwood<text:line-break/>2<text:line-break/></text:span><text:a xlink:type="simple" xlink:href="https://www.w3resource.com/python-exercises/list/python-data-type-list-exercise-225.php" office:target-frame-name="_blank" xlink:show="new" text:style-name="Internet_20_link" text:visited-style-name="Visited_20_Internet_20_Link">Click me to see the sample solution</text:a></text:p>
      <text:p text:style-name="P4"><text:span text:style-name="Strong_20_Emphasis"><text:span text:style-name="T1">226.</text:span></text:span><text:span text:style-name="T1"> Write a Python program to get a list of elements that exist in both lists, after applying the provided function to each list element of both.<text:line-break/>Sample Output:<text:line-break/>[2.1]<text:line-break/></text:span><text:a xlink:type="simple" xlink:href="https://www.w3resource.com/python-exercises/list/python-data-type-list-exercise-226.php" office:target-frame-name="_blank" xlink:show="new" text:style-name="Internet_20_link" text:visited-style-name="Visited_20_Internet_20_Link">Click me to see the sample solution</text:a></text:p>
      <text:p text:style-name="P4"><text:soft-page-break/><text:span text:style-name="Strong_20_Emphasis"><text:span text:style-name="T1">227.</text:span></text:span><text:span text:style-name="T1"> Write a Python program to get the symmetric difference between two lists, after applying the provided function to each list element of both.<text:line-break/>Sample Output:<text:line-break/>[1.2, 3.4]<text:line-break/></text:span><text:a xlink:type="simple" xlink:href="https://www.w3resource.com/python-exercises/list/python-data-type-list-exercise-227.php" office:target-frame-name="_blank" xlink:show="new" text:style-name="Internet_20_link" text:visited-style-name="Visited_20_Internet_20_Link">Click me to see the sample solution</text:a></text:p>
      <text:p text:style-name="P5"><text:span text:style-name="Strong_20_Emphasis"><text:span text:style-name="T1">22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t every element that exists in any of the two given lists once, after applying the provided function to each element of both.<text:line-break/>Sample Output:<text:line-break/>[2.2, 4.1]<text:line-break/></text:span><text:a xlink:type="simple" xlink:href="https://www.w3resource.com/python-exercises/list/python-data-type-list-exercise-228.php" office:target-frame-name="_blank" xlink:show="new" text:style-name="Internet_20_link" text:visited-style-name="Visited_20_Internet_20_Link">Click me to see the sample solution</text:a></text:p>
      <text:p text:style-name="P5"><text:span text:style-name="Strong_20_Emphasis"><text:span text:style-name="T1">22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index of the first element in the given list that satisfies the provided testing function.<text:line-break/>Sample Output:<text:line-break/>0<text:line-break/></text:span><text:a xlink:type="simple" xlink:href="https://www.w3resource.com/python-exercises/list/python-data-type-list-exercise-229.php" office:target-frame-name="_blank" xlink:show="new" text:style-name="Internet_20_link" text:visited-style-name="Visited_20_Internet_20_Link">Click me to see the sample solution</text:a></text:p>
      <text:p text:style-name="P4"><text:span text:style-name="Strong_20_Emphasis"><text:span text:style-name="T1">230.</text:span></text:span><text:span text:style-name="T1"> Write a Python program to find the indexes of all elements in the given list that satisfy the provided testing function.<text:line-break/>Sample Output:<text:line-break/>[0, 2]<text:line-break/></text:span><text:a xlink:type="simple" xlink:href="https://www.w3resource.com/python-exercises/list/python-data-type-list-exercise-230.php" office:target-frame-name="_blank" xlink:show="new" text:style-name="Internet_20_link" text:visited-style-name="Visited_20_Internet_20_Link">Click me to see the sample solution</text:a></text:p>
      <text:p text:style-name="P4"><text:span text:style-name="Strong_20_Emphasis"><text:span text:style-name="T1">231.</text:span></text:span><text:span text:style-name="T1"> Write a Python program to split values into two groups, based on the result of the given filter list.<text:line-break/>Sample Output:<text:line-break/>[['red', 'green', 'pink'], ['blue']]<text:line-break/></text:span><text:a xlink:type="simple" xlink:href="https://www.w3resource.com/python-exercises/list/python-data-type-list-exercise-231.php" office:target-frame-name="_blank" xlink:show="new" text:style-name="Internet_20_link" text:visited-style-name="Visited_20_Internet_20_Link">Click me to see the sample solution</text:a></text:p>
      <text:p text:style-name="P5"><text:span text:style-name="Strong_20_Emphasis"><text:span text:style-name="T1">23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unk a given list into smaller lists of a specified size.<text:line-break/>Sample Output:<text:line-break/>[[1, 2, 3], [4, 5, 6], [7, 8]]<text:line-break/></text:span><text:a xlink:type="simple" xlink:href="https://www.w3resource.com/python-exercises/list/python-data-type-list-exercise-232.php" office:target-frame-name="_blank" xlink:show="new" text:style-name="Internet_20_link" text:visited-style-name="Visited_20_Internet_20_Link">Click me to see the sample solution</text:a></text:p>
      <text:p text:style-name="P5"><text:span text:style-name="Strong_20_Emphasis"><text:span text:style-name="T1">23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unk a given list into n smaller lists.<text:line-break/>Sample Output:<text:line-break/>[[1, 2], [3, 4], [5, 6], [7]]<text:line-break/></text:span><text:a xlink:type="simple" xlink:href="https://www.w3resource.com/python-exercises/list/python-data-type-list-exercise-233.php" office:target-frame-name="_blank" xlink:show="new" text:style-name="Internet_20_link" text:visited-style-name="Visited_20_Internet_20_Link">Click me to see the sample solution</text:a></text:p>
      <text:p text:style-name="P4"><text:span text:style-name="Strong_20_Emphasis"><text:span text:style-name="T1">234.</text:span></text:span><text:span text:style-name="T1"> Write a Python program to convert a given number (integer) to a list of digits.<text:line-break/>Sample Output:<text:line-break/></text:span><text:soft-page-break/><text:span text:style-name="T1">[1, 2, 3]<text:line-break/>[1, 3, 4, 7, 8, 2, 3]<text:line-break/></text:span><text:a xlink:type="simple" xlink:href="https://www.w3resource.com/python-exercises/list/python-data-type-list-exercise-234.php" office:target-frame-name="_blank" xlink:show="new" text:style-name="Internet_20_link" text:visited-style-name="Visited_20_Internet_20_Link">Click me to see the sample solution</text:a></text:p>
      <text:p text:style-name="P4"><text:span text:style-name="Strong_20_Emphasis"><text:span text:style-name="T1">235.</text:span></text:span><text:span text:style-name="T1"> Write a Python program to find the index of the last element in the given list that satisfies the provided testing function.<text:line-break/>Sample Output:<text:line-break/>2<text:line-break/></text:span><text:a xlink:type="simple" xlink:href="https://www.w3resource.com/python-exercises/list/python-data-type-list-exercise-235.php" office:target-frame-name="_blank" xlink:show="new" text:style-name="Internet_20_link" text:visited-style-name="Visited_20_Internet_20_Link">Click me to see the sample solution</text:a></text:p>
      <text:p text:style-name="P5"><text:span text:style-name="Strong_20_Emphasis"><text:span text:style-name="T1">23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items that are parity outliers in a given list.<text:line-break/>Sample Output:<text:line-break/>[1, 3]<text:line-break/>[2, 4, 6]<text:line-break/></text:span><text:a xlink:type="simple" xlink:href="https://www.w3resource.com/python-exercises/list/python-data-type-list-exercise-236.php" office:target-frame-name="_blank" xlink:show="new" text:style-name="Internet_20_link" text:visited-style-name="Visited_20_Internet_20_Link">Click me to see the sample solution</text:a></text:p>
      <text:p text:style-name="P5"><text:span text:style-name="Strong_20_Emphasis"><text:span text:style-name="T1">23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nvert a given list of dictionaries into a list of values corresponding to the specified key.<text:line-break/>Sample Output:<text:line-break/>[8, 36, 34, 10]<text:line-break/></text:span><text:a xlink:type="simple" xlink:href="https://www.w3resource.com/python-exercises/list/python-data-type-list-exercise-237.php" office:target-frame-name="_blank" xlink:show="new" text:style-name="Internet_20_link" text:visited-style-name="Visited_20_Internet_20_Link">Click me to see the sample solution</text:a></text:p>
      <text:p text:style-name="P4"><text:span text:style-name="Strong_20_Emphasis"><text:span text:style-name="T1">238.</text:span></text:span><text:span text:style-name="T1"> Write a Python program to calculate the average of a given list, after mapping each element to a value using the provided function.<text:line-break/>Sample Output:<text:line-break/>5.0<text:line-break/>15.0<text:line-break/></text:span><text:a xlink:type="simple" xlink:href="https://www.w3resource.com/python-exercises/list/python-data-type-list-exercise-238.php" office:target-frame-name="_blank" xlink:show="new" text:style-name="Internet_20_link" text:visited-style-name="Visited_20_Internet_20_Link">Click me to see the sample solution</text:a></text:p>
      <text:p text:style-name="P4"><text:span text:style-name="Strong_20_Emphasis"><text:span text:style-name="T1">239.</text:span></text:span><text:span text:style-name="T1"> Write a Python program to find the value of the first element in the given list that satisfies the provided testing function.<text:line-break/>Sample Output:<text:line-break/>1<text:line-break/>2<text:line-break/></text:span><text:a xlink:type="simple" xlink:href="https://www.w3resource.com/python-exercises/list/python-data-type-list-exercise-239.php" office:target-frame-name="_blank" xlink:show="new" text:style-name="Internet_20_link" text:visited-style-name="Visited_20_Internet_20_Link">Click me to see the sample solution</text:a></text:p>
      <text:p text:style-name="P5"><text:span text:style-name="Strong_20_Emphasis"><text:span text:style-name="T1">24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value of the last element in the given list that satisfies the provided testing function.<text:line-break/>Sample Output:<text:line-break/>3<text:line-break/></text:span><text:soft-page-break/><text:span text:style-name="T1">4<text:line-break/></text:span><text:a xlink:type="simple" xlink:href="https://www.w3resource.com/python-exercises/list/python-data-type-list-exercise-240.php" office:target-frame-name="_blank" xlink:show="new" text:style-name="Internet_20_link" text:visited-style-name="Visited_20_Internet_20_Link">Click me to see the sample solution</text:a></text:p>
      <text:p text:style-name="P5"><text:span text:style-name="Strong_20_Emphasis"><text:span text:style-name="T1">24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reate a dictionary with the unique values of a given list as keys and their frequencies as values.<text:line-break/>Sample Output:<text:line-break/>{'a': 4, 'b': 2, 'f': 2, 'c': 1, 'e': 2}<text:line-break/>{3: 4, 4: 2, 7: 1, 5: 2, 9: 1, 0: 1, 2: 1}<text:line-break/></text:span><text:a xlink:type="simple" xlink:href="https://www.w3resource.com/python-exercises/list/python-data-type-list-exercise-241.php" office:target-frame-name="_blank" xlink:show="new" text:style-name="Internet_20_link" text:visited-style-name="Visited_20_Internet_20_Link">Click me to see the sample solution</text:a></text:p>
      <text:p text:style-name="P4"><text:span text:style-name="Strong_20_Emphasis"><text:span text:style-name="T1">242.</text:span></text:span><text:span text:style-name="T1"> Write a Python program to get the symmetric difference between two iterables, without filtering out duplicate values.<text:line-break/>Sample Output:<text:line-break/>[30, 40]<text:line-break/></text:span><text:a xlink:type="simple" xlink:href="https://www.w3resource.com/python-exercises/list/python-data-type-list-exercise-242.php" office:target-frame-name="_blank" xlink:show="new" text:style-name="Internet_20_link" text:visited-style-name="Visited_20_Internet_20_Link">Click me to see the sample solution</text:a></text:p>
      <text:p text:style-name="P5"><text:span text:style-name="Strong_20_Emphasis"><text:span text:style-name="T1">24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eck if a given function returns True for every element in a list.<text:line-break/>Sample Output:<text:line-break/>True<text:line-break/>False<text:line-break/>False<text:line-break/></text:span><text:a xlink:type="simple" xlink:href="https://www.w3resource.com/python-exercises/list/python-data-type-list-exercise-243.php" office:target-frame-name="_blank" xlink:show="new" text:style-name="Internet_20_link" text:visited-style-name="Visited_20_Internet_20_Link">Click me to see the sample solution</text:a></text:p>
      <text:p text:style-name="P4"><text:span text:style-name="Strong_20_Emphasis"><text:span text:style-name="T1">244.</text:span></text:span><text:span text:style-name="T1"> Write a Python program to initialize a list containing the numbers in the specified range where start and end are inclusive and the ratio between two terms is step. Return an error if step equals 1.<text:line-break/>Sample Output:<text:line-break/>[1, 2, 4, 8, 16, 32, 64, 128, 256]<text:line-break/>[3, 6, 12, 24, 48, 96, 192]<text:line-break/>[1, 4, 16, 64, 256]<text:line-break/></text:span><text:a xlink:type="simple" xlink:href="https://www.w3resource.com/python-exercises/list/python-data-type-list-exercise-244.php" office:target-frame-name="_blank" xlink:show="new" text:style-name="Internet_20_link" text:visited-style-name="Visited_20_Internet_20_Link">Click me to see the sample solution</text:a></text:p>
      <text:p text:style-name="P5"><text:span text:style-name="Strong_20_Emphasis"><text:span text:style-name="T1">24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hat takes any number of iterable objects or objects with a length property and returns the longest one.<text:line-break/>Sample Output:<text:line-break/>Green<text:line-break/>[1, 2, 3, 4, 5]<text:line-break/>[1, 2, 3, 4]<text:line-break/></text:span><text:a xlink:type="simple" xlink:href="https://www.w3resource.com/python-exercises/list/python-data-type-list-exercise-245.php" office:target-frame-name="_blank" xlink:show="new" text:style-name="Internet_20_link" text:visited-style-name="Visited_20_Internet_20_Link">Click me to see the sample solution</text:a></text:p>
      <text:p text:style-name="P5"><text:soft-page-break/><text:span text:style-name="Strong_20_Emphasis"><text:span text:style-name="T1">24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eck if a given function returns True for at least one element in the list.<text:line-break/>Sample Output:<text:line-break/>True<text:line-break/>False<text:line-break/></text:span><text:a xlink:type="simple" xlink:href="https://www.w3resource.com/python-exercises/list/python-data-type-list-exercise-246.php" office:target-frame-name="_blank" xlink:show="new" text:style-name="Internet_20_link" text:visited-style-name="Visited_20_Internet_20_Link">Click me to see the sample solution</text:a></text:p>
      <text:p text:style-name="P4"><text:span text:style-name="Strong_20_Emphasis"><text:span text:style-name="T1">247.</text:span></text:span><text:span text:style-name="T1"> Write a Python program to calculate the difference between two iterables, without filtering duplicate values.<text:line-break/>Sample Output:<text:line-break/>[3]<text:line-break/></text:span><text:a xlink:type="simple" xlink:href="https://www.w3resource.com/python-exercises/list/python-data-type-list-exercise-247.php" office:target-frame-name="_blank" xlink:show="new" text:style-name="Internet_20_link" text:visited-style-name="Visited_20_Internet_20_Link">Click me to see the sample solution</text:a></text:p>
      <text:p text:style-name="P4"><text:span text:style-name="Strong_20_Emphasis"><text:span text:style-name="T1">248.</text:span></text:span><text:span text:style-name="T1"> Write a Python program to get the maximum value of a list, after mapping each element to a value using a given function.<text:line-break/>Sample Output:<text:line-break/>8<text:line-break/></text:span><text:a xlink:type="simple" xlink:href="https://www.w3resource.com/python-exercises/list/python-data-type-list-exercise-248.php" office:target-frame-name="_blank" xlink:show="new" text:style-name="Internet_20_link" text:visited-style-name="Visited_20_Internet_20_Link">Click me to see the sample solution</text:a></text:p>
      <text:p text:style-name="P5"><text:span text:style-name="Strong_20_Emphasis"><text:span text:style-name="T1">24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t the minimum value of a list, after mapping each element to a value using a given function.<text:line-break/>Sample Output:<text:line-break/>2<text:line-break/></text:span><text:a xlink:type="simple" xlink:href="https://www.w3resource.com/python-exercises/list/python-data-type-list-exercise-249.php" office:target-frame-name="_blank" xlink:show="new" text:style-name="Internet_20_link" text:visited-style-name="Visited_20_Internet_20_Link">Click me to see the sample solution</text:a></text:p>
      <text:p text:style-name="P5"><text:span text:style-name="Strong_20_Emphasis"><text:span text:style-name="T1">25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alculate the sum of a list, after mapping each element to a value using the provided function.<text:line-break/>Sample Output:<text:line-break/>20<text:line-break/></text:span><text:a xlink:type="simple" xlink:href="https://www.w3resource.com/python-exercises/list/python-data-type-list-exercise-250.php" office:target-frame-name="_blank" xlink:show="new" text:style-name="Internet_20_link" text:visited-style-name="Visited_20_Internet_20_Link">Click me to see the sample solution</text:a></text:p>
      <text:p text:style-name="P4"><text:span text:style-name="Strong_20_Emphasis"><text:span text:style-name="T1">251.</text:span></text:span><text:span text:style-name="T1"> Write a Python program that fills a list with the specified value.<text:line-break/>Sample Output:<text:line-break/>[0, 0, 0, 0, 0, 0, 0]<text:line-break/>[3, 3, 3, 3, 3, 3, 3, 3]<text:line-break/>[-2, -2, -2, -2, -2]<text:line-break/>[3.2, 3.2, 3.2, 3.2, 3.2]<text:line-break/></text:span><text:a xlink:type="simple" xlink:href="https://www.w3resource.com/python-exercises/list/python-data-type-list-exercise-251.php" office:target-frame-name="_blank" xlink:show="new" text:style-name="Internet_20_link" text:visited-style-name="Visited_20_Internet_20_Link">Click me to see the sample solution</text:a></text:p>
      <text:p text:style-name="P4"><text:span text:style-name="Strong_20_Emphasis"><text:span text:style-name="T1">252.</text:span></text:span><text:span text:style-name="T1"> Write a Python program to get the n maximum elements from a given list of numbers.<text:line-break/></text:span><text:soft-page-break/><text:span text:style-name="T1">Sample Output:<text:line-break/>Original list elements:<text:line-break/>[1, 2, 3]<text:line-break/>Maximum values of the said list: [3]<text:line-break/>Original list elements:<text:line-break/>[1, 2, 3]<text:line-break/>Two maximum values of the said list: [3, 2]<text:line-break/>Original list elements:<text:line-break/>[-2, -3, -1, -2, -4, 0, -5]<text:line-break/>Threee maximum values of the said list: [0, -1, -2]<text:line-break/>Original list elements:<text:line-break/>[2.2, 2, 3.2, 4.5, 4.6, 5.2, 2.9]<text:line-break/>Two maximum values of the said list: [5.2, 4.6]<text:line-break/></text:span><text:a xlink:type="simple" xlink:href="https://www.w3resource.com/python-exercises/list/python-data-type-list-exercise-252.php" office:target-frame-name="_blank" xlink:show="new" text:style-name="Internet_20_link" text:visited-style-name="Visited_20_Internet_20_Link">Click me to see the sample solution</text:a></text:p>
      <text:p text:style-name="P5"><text:span text:style-name="Strong_20_Emphasis"><text:span text:style-name="T1">25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t the n minimum elements from a given list of numbers.<text:line-break/>Sample Output:<text:line-break/>Original list elements:<text:line-break/>[1, 2, 3]<text:line-break/>Minimum values of the said list: [1]<text:line-break/>Original list elements:<text:line-break/>[1, 2, 3]<text:line-break/>Two minimum values of the said list: [1, 2]<text:line-break/>Original list elements:<text:line-break/>[-2, -3, -1, -2, -4, 0, -5]<text:line-break/>Threee minimum values of the said list: [-5, -4, -3]<text:line-break/>Original list elements:<text:line-break/>[2.2, 2, 3.2, 4.5, 4.6, 5.2, 2.9]<text:line-break/>Two minimum values of the said list: [2, 2.2]<text:line-break/></text:span><text:a xlink:type="simple" xlink:href="https://www.w3resource.com/python-exercises/list/python-data-type-list-exercise-253.php" office:target-frame-name="_blank" xlink:show="new" text:style-name="Internet_20_link" text:visited-style-name="Visited_20_Internet_20_Link">Click me to see the sample solution</text:a></text:p>
      <text:p text:style-name="P5"><text:span text:style-name="Strong_20_Emphasis"><text:span text:style-name="T1">25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t the weighted average of two or more numbers.<text:line-break/>Sample Output:<text:line-break/>Original list elements:<text:line-break/>[10, 50, 40]<text:line-break/>[2, 5, 3]<text:line-break/>Weighted average of the said two list of numbers:<text:line-break/>39.0<text:line-break/></text:span><text:soft-page-break/><text:span text:style-name="T1">Original list elements:<text:line-break/>[82, 90, 76, 83]<text:line-break/>[0.2, 0.35, 0.45, 32]<text:line-break/>Weighted average of the said two list of numbers:<text:line-break/>82.97272727272727<text:line-break/></text:span><text:a xlink:type="simple" xlink:href="https://www.w3resource.com/python-exercises/list/python-data-type-list-exercise-254.php" office:target-frame-name="_blank" xlink:show="new" text:style-name="Internet_20_link" text:visited-style-name="Visited_20_Internet_20_Link">Click me to see the sample solution</text:a></text:p>
      <text:p text:style-name="P5"><text:span text:style-name="Strong_20_Emphasis"><text:span text:style-name="T1">25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perform a deep flattening of a list.<text:line-break/>Sample Output:<text:line-break/>Original list elements:<text:line-break/>[1, [2], [[3], [4], 5], 6]<text:line-break/>Deep flatten the said list:<text:line-break/>[1, 2, 3, 4, 5, 6]<text:line-break/>Original list elements:<text:line-break/>[[[1, 2, 3], [4, 5]], 6]<text:line-break/>Deep flatten the said list:<text:line-break/>[1, 2, 3, 4, 5, 6]<text:line-break/></text:span><text:a xlink:type="simple" xlink:href="https://www.w3resource.com/python-exercises/list/python-data-type-list-exercise-255.php" office:target-frame-name="_blank" xlink:show="new" text:style-name="Internet_20_link" text:visited-style-name="Visited_20_Internet_20_Link">Click me to see the sample solution</text:a></text:p>
      <text:p text:style-name="P5"><text:span text:style-name="Strong_20_Emphasis"><text:span text:style-name="T1">25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t the powerset of a given iterable.<text:line-break/>Sample Output:<text:line-break/>Original list elements:<text:line-break/>[1, 2]<text:line-break/>Powerset of the said list:<text:line-break/>[(), (1,), (2,), (1, 2)]<text:line-break/>Original list elements:<text:line-break/>[1, 2, 3, 4]<text:line-break/>Powerset of the said list:<text:line-break/>[(), (1,), (2,), (3,), (4,), (1, 2), (1, 3), (1, 4), (2, 3), (2, 4), (3, 4), (1, 2, 3), (1, 2, 4), (1, 3, 4), (2, 3, 4), (1, 2, 3, 4)]<text:line-break/></text:span><text:a xlink:type="simple" xlink:href="https://www.w3resource.com/python-exercises/list/python-data-type-list-exercise-256.php" office:target-frame-name="_blank" xlink:show="new" text:style-name="Internet_20_link" text:visited-style-name="Visited_20_Internet_20_Link">Click me to see the sample solution</text:a></text:p>
      <text:p text:style-name="P5"><text:span text:style-name="Strong_20_Emphasis"><text:span text:style-name="T1">25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eck if two given lists contain the same elements regardless of order.<text:line-break/>Sample Output:<text:line-break/>Original list elements:<text:line-break/>[1, 2, 4]<text:line-break/>[2, 4, 1]<text:line-break/>Check two said lists contain the same elements regardless of order!<text:line-break/>True<text:line-break/></text:span><text:soft-page-break/><text:span text:style-name="T1">Original list elements:<text:line-break/>[1, 2, 3]<text:line-break/>[1, 2, 3]<text:line-break/>Check two said lists contain the same elements regardless of order!<text:line-break/>True<text:line-break/>Original list elements:<text:line-break/>[1, 2, 3]<text:line-break/>[1, 2, 4]<text:line-break/>Check two said lists contain the same elements regardless of order!<text:line-break/>False<text:line-break/></text:span><text:a xlink:type="simple" xlink:href="https://www.w3resource.com/python-exercises/list/python-data-type-list-exercise-257.php" office:target-frame-name="_blank" xlink:show="new" text:style-name="Internet_20_link" text:visited-style-name="Visited_20_Internet_20_Link">Click me to see the sample solution</text:a></text:p>
      <text:p text:style-name="P5"><text:span text:style-name="Strong_20_Emphasis"><text:span text:style-name="T1">258.</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reate a flat list of all the keys in a flat dictionary.<text:line-break/>Sample Output:<text:line-break/>Original directory elements:<text:line-break/>{'Laura': 10, 'Spencer': 11, 'Bridget': 9, 'Howard ': 10}<text:line-break/>Flat list of all the keys of the said dictionary:<text:line-break/>['Laura', 'Spencer', 'Bridget', 'Howard ']<text:line-break/></text:span><text:a xlink:type="simple" xlink:href="https://www.w3resource.com/python-exercises/list/python-data-type-list-exercise-258.php" office:target-frame-name="_blank" xlink:show="new" text:style-name="Internet_20_link" text:visited-style-name="Visited_20_Internet_20_Link">Click me to see the sample solution</text:a></text:p>
      <text:p text:style-name="P5"><text:span text:style-name="Strong_20_Emphasis"><text:span text:style-name="T1">25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eck if a given function returns True for at least one element in the list.<text:line-break/>Sample Output:<text:line-break/>False<text:line-break/>True<text:line-break/>False<text:line-break/></text:span><text:a xlink:type="simple" xlink:href="https://www.w3resource.com/python-exercises/list/python-data-type-list-exercise-259.php" office:target-frame-name="_blank" xlink:show="new" text:style-name="Internet_20_link" text:visited-style-name="Visited_20_Internet_20_Link">Click me to see the sample solution</text:a></text:p>
      <text:p text:style-name="P4"><text:span text:style-name="Strong_20_Emphasis"><text:span text:style-name="T1">260.</text:span></text:span><text:span text:style-name="T1"> Write a Python program to check if all the elements of a list are included in another given list.<text:line-break/>Sample Output:<text:line-break/>True<text:line-break/>False<text:line-break/></text:span><text:a xlink:type="simple" xlink:href="https://www.w3resource.com/python-exercises/list/python-data-type-list-exercise-260.php" office:target-frame-name="_blank" xlink:show="new" text:style-name="Internet_20_link" text:visited-style-name="Visited_20_Internet_20_Link">Click me to see the sample solution</text:a></text:p>
      <text:p text:style-name="P5"><text:span text:style-name="Strong_20_Emphasis"><text:span text:style-name="T1">261.</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t the most frequent element in a given list of numbers.<text:line-break/>Sample Output:<text:line-break/>2<text:line-break/>Original list:<text:line-break/>[2, 3, 8, 4, 7, 9, 8, 2, 6, 5, 1, 6, 1, 2, 3, 2, 4, 6, 9, 1, 2]<text:line-break/></text:span><text:soft-page-break/><text:span text:style-name="T1">Item with maximum frequency of the said list:<text:line-break/>2<text:line-break/>Original list:<text:line-break/>[1, 2, 3, 1, 2, 3, 2, 1, 4, 3, 3]<text:line-break/>Item with maximum frequency of the said list:<text:line-break/>3<text:line-break/></text:span><text:a xlink:type="simple" xlink:href="https://www.w3resource.com/python-exercises/list/python-data-type-list-exercise-261.php" office:target-frame-name="_blank" xlink:show="new" text:style-name="Internet_20_link" text:visited-style-name="Visited_20_Internet_20_Link">Click me to see the sample solution</text:a></text:p>
      <text:p text:style-name="P5"><text:span text:style-name="Strong_20_Emphasis"><text:span text:style-name="T1">26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move the specified number of elements to the end of the given list.<text:line-break/>Sample Output:<text:line-break/>[4, 5, 6, 7, 8, 1, 2, 3]<text:line-break/>[6, 7, 8, 1, 2, 3, 4, 5]<text:line-break/>[1, 2, 3, 4, 5, 6, 7, 8]<text:line-break/>[1, 2, 3, 4, 5, 6, 7, 8]<text:line-break/>[8, 1, 2, 3, 4, 5, 6, 7]<text:line-break/>[2, 3, 4, 5, 6, 7, 8, 1]<text:line-break/></text:span><text:a xlink:type="simple" xlink:href="https://www.w3resource.com/python-exercises/list/python-data-type-list-exercise-262.php" office:target-frame-name="_blank" xlink:show="new" text:style-name="Internet_20_link" text:visited-style-name="Visited_20_Internet_20_Link">Click me to see the sample solution</text:a></text:p>
      <text:p text:style-name="P5"><text:span text:style-name="Strong_20_Emphasis"><text:span text:style-name="T1">26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move the specified number of elements to the start of the given list.<text:line-break/>Sample Output:<text:line-break/>[4, 5, 6, 7, 8, 1, 2, 3]<text:line-break/>[6, 7, 8, 1, 2, 3, 4, 5]<text:line-break/>[1, 2, 3, 4, 5, 6, 7, 8]<text:line-break/>[1, 2, 3, 4, 5, 6, 7, 8]<text:line-break/>[8, 1, 2, 3, 4, 5, 6, 7]<text:line-break/>[2, 3, 4, 5, 6, 7, 8, 1]<text:line-break/></text:span><text:a xlink:type="simple" xlink:href="https://www.w3resource.com/python-exercises/list/python-data-type-list-exercise-263.php" office:target-frame-name="_blank" xlink:show="new" text:style-name="Internet_20_link" text:visited-style-name="Visited_20_Internet_20_Link">Click me to see the sample solution</text:a></text:p>
      <text:p text:style-name="P5"><text:span text:style-name="Strong_20_Emphasis"><text:span text:style-name="T1">26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reate a two-dimensional list from a given list of lists.<text:line-break/>Sample Output:<text:line-break/>[(1, 4, 7, 10), (2, 5, 8, 11), (3, 6, 9, 12)]<text:line-break/>[(1, 4), (2, 5)]<text:line-break/></text:span><text:a xlink:type="simple" xlink:href="https://www.w3resource.com/python-exercises/list/python-data-type-list-exercise-264.php" office:target-frame-name="_blank" xlink:show="new" text:style-name="Internet_20_link" text:visited-style-name="Visited_20_Internet_20_Link">Click me to see the sample solution</text:a></text:p>
      <text:p text:style-name="P5"><text:span text:style-name="Strong_20_Emphasis"><text:span text:style-name="T1">26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nerate a list containing the Fibonacci sequence, up until the nth term.<text:line-break/>Sample Output:<text:line-break/>First 7 Fibonacci numbers:<text:line-break/>[0, 1, 1, 2, 3, 5, 8, 13]<text:line-break/></text:span><text:soft-page-break/><text:span text:style-name="T1">First 15 Fibonacci numbers:<text:line-break/>[0, 1, 1, 2, 3, 5, 8, 13, 21, 34, 55, 89, 144, 233, 377, 610]<text:line-break/>First 50 Fibonacci numbers:<text:line-break/>[0, 1, 1, 2, 3, 5, 8, 13, 21, 34, 55, 89, 144, 233, 377, 610, 987, 1597, 2584, 4181, 6765, 10946, 17711, 28657, 46368, 75025, 121393, 196418, 317811, 514229, 832040, 1346269, 2178309, 3524578, 5702887, 9227465, 14930352, 24157817, 39088169, 63245986, 102334155, 165580141, 267914296, 433494437, 701408733, 1134903170, 1836311903, 2971215073, 4807526976, 7778742049, 12586269025]<text:line-break/></text:span><text:a xlink:type="simple" xlink:href="https://www.w3resource.com/python-exercises/list/python-data-type-list-exercise-265.php" office:target-frame-name="_blank" xlink:show="new" text:style-name="Internet_20_link" text:visited-style-name="Visited_20_Internet_20_Link">Click me to see the sample solution</text:a></text:p>
      <text:p text:style-name="P5"><text:span text:style-name="Strong_20_Emphasis"><text:span text:style-name="T1">26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ast the provided value as a list if it's not one.<text:line-break/>Sample Output:<text:line-break/>&lt;class 'list'&gt;<text:line-break/>[1]<text:line-break/>&lt;class 'tuple'&gt;<text:line-break/>['Red', 'Green']<text:line-break/>&lt;class 'set'&gt;<text:line-break/>['Green', 'Red']<text:line-break/>&lt;class 'dict'&gt;<text:line-break/>[1, 2, 3]<text:line-break/></text:span><text:a xlink:type="simple" xlink:href="https://www.w3resource.com/python-exercises/list/python-data-type-list-exercise-266.php" office:target-frame-name="_blank" xlink:show="new" text:style-name="Internet_20_link" text:visited-style-name="Visited_20_Internet_20_Link">Click me to see the sample solution</text:a></text:p>
      <text:p text:style-name="P5"><text:span text:style-name="Strong_20_Emphasis"><text:span text:style-name="T1">26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t the cumulative sum of the elements of a given list.<text:line-break/>Sample Output:<text:line-break/>Original list elements:<text:line-break/>[1, 2, 3, 4]<text:line-break/>Cumulative sum of the elements of the said list:<text:line-break/>[1, 3, 6, 10]<text:line-break/>Original list elements:<text:line-break/>[-1, -2, -3, 4]<text:line-break/>Cumulative sum of the elements of the said list:<text:line-break/>[-1, -3, -6, -2]<text:line-break/></text:span><text:a xlink:type="simple" xlink:href="https://www.w3resource.com/python-exercises/list/python-data-type-list-exercise-267.php" office:target-frame-name="_blank" xlink:show="new" text:style-name="Internet_20_link" text:visited-style-name="Visited_20_Internet_20_Link">Click me to see the sample solution</text:a></text:p>
      <text:p text:style-name="P4"><text:span text:style-name="Strong_20_Emphasis"><text:span text:style-name="T1">268.</text:span></text:span><text:span text:style-name="T1"> Write a Python program to get a list with n elements removed from the left and right.<text:line-break/>Sample Output:<text:line-break/>Original list elements:<text:line-break/>[1, 2, 3]<text:line-break/>Remove 1 element from left of the said list:<text:line-break/></text:span><text:soft-page-break/><text:span text:style-name="T1">[2, 3]<text:line-break/>Remove 1 element from right of the said list:<text:line-break/>[1, 2]<text:line-break/>Original list elements:<text:line-break/>[1, 2, 3, 4]<text:line-break/>Remove 2 elements from left of the said list:<text:line-break/>[3, 4]<text:line-break/>Remove 2 elements from right of the said list:<text:line-break/>[1, 2]<text:line-break/>Original list elements:<text:line-break/>[1, 2, 3, 4, 5, 6]<text:line-break/>Remove 7 elements from left of the said list:<text:line-break/>[2, 3, 4, 5, 6]<text:line-break/>Remove 7 elements from right of the said list:<text:line-break/>[1, 2, 3, 4, 5]<text:line-break/></text:span><text:a xlink:type="simple" xlink:href="https://www.w3resource.com/python-exercises/list/python-data-type-list-exercise-268.php" office:target-frame-name="_blank" xlink:show="new" text:style-name="Internet_20_link" text:visited-style-name="Visited_20_Internet_20_Link">Click me to see the sample solution</text:a></text:p>
      <text:p text:style-name="P5"><text:span text:style-name="Strong_20_Emphasis"><text:span text:style-name="T1">26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t every nth element in a given list.<text:line-break/>Sample Output:<text:line-break/>[1, 2, 3, 4, 5, 6, 7, 8, 9, 10]<text:line-break/>[2, 4, 6, 8, 10]<text:line-break/>[5, 10]<text:line-break/>[6]<text:line-break/></text:span><text:a xlink:type="simple" xlink:href="https://www.w3resource.com/python-exercises/list/python-data-type-list-exercise-269.php" office:target-frame-name="_blank" xlink:show="new" text:style-name="Internet_20_link" text:visited-style-name="Visited_20_Internet_20_Link">Click me to see the sample solution</text:a></text:p>
      <text:p text:style-name="P5"><text:span text:style-name="Strong_20_Emphasis"><text:span text:style-name="T1">270.</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heck if the elements of the first list are contained in the second one regardless of order.<text:line-break/>Sample Output:<text:line-break/>True<text:line-break/>True<text:line-break/>False<text:line-break/>True<text:line-break/></text:span><text:a xlink:type="simple" xlink:href="https://www.w3resource.com/python-exercises/list/python-data-type-list-exercise-270.php" office:target-frame-name="_blank" xlink:show="new" text:style-name="Internet_20_link" text:visited-style-name="Visited_20_Internet_20_Link">Click me to see the sample solution</text:a></text:p>
      <text:p text:style-name="P4"><text:span text:style-name="Strong_20_Emphasis"><text:span text:style-name="T1">271.</text:span></text:span><text:span text:style-name="T1"> Write a Python program to check if there are duplicate values in a given flat list.<text:line-break/>Sample Output:<text:line-break/>Original list:<text:line-break/>[1, 2, 3, 4, 5, 6, 7]<text:line-break/>Check if there are duplicate values in the said given flat list:<text:line-break/>False<text:line-break/></text:span><text:soft-page-break/><text:span text:style-name="T1">Original list:<text:line-break/>[1, 2, 3, 3, 4, 5, 5, 6, 7]<text:line-break/>Check if there are duplicate values in the said given flat list:<text:line-break/>True<text:line-break/></text:span><text:a xlink:type="simple" xlink:href="https://www.w3resource.com/python-exercises/list/python-data-type-list-exercise-271.php" office:target-frame-name="_blank" xlink:show="new" text:style-name="Internet_20_link" text:visited-style-name="Visited_20_Internet_20_Link">Click me to see the sample solution</text:a></text:p>
      <text:p text:style-name="P5"><text:span text:style-name="Strong_20_Emphasis"><text:span text:style-name="T1">272.</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generate a list of numbers in the arithmetic progression starting with the given positive integer and up to the specified limit.<text:line-break/>Sample Output:<text:line-break/>[1, 2, 3, 4, 5, 6, 7, 8, 9, 10, 11, 12, 13, 14, 15]<text:line-break/>[3, 6, 9, 12, 15, 18, 21, 24, 27, 30, 33, 36]<text:line-break/>[5, 10, 15, 20, 25]<text:line-break/></text:span><text:a xlink:type="simple" xlink:href="https://www.w3resource.com/python-exercises/list/python-data-type-list-exercise-272.php" office:target-frame-name="_blank" xlink:show="new" text:style-name="Internet_20_link" text:visited-style-name="Visited_20_Internet_20_Link">Click me to see the sample solution</text:a></text:p>
      <text:p text:style-name="P5"><text:span text:style-name="Strong_20_Emphasis"><text:span text:style-name="T1">273.</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an element that divides a given list of integers with the same sum value.<text:line-break/>Sample Output:<text:line-break/>Original list:<text:line-break/>[0, 9, 2, 4, 5, 6]<text:line-break/>Element that devides the said list of integers with the same sum value:<text:line-break/>4<text:line-break/>Original list:<text:line-break/>[-4, 0, 6, 1, 0, 2]<text:line-break/>Element that devides the said list of integers with the same sum value:<text:line-break/>1<text:line-break/>Original list:<text:line-break/>[1, 2, 3, 4]<text:line-break/>Element that devides the said list of integers with the same sum value:<text:line-break/>No such element!<text:line-break/>Original list:<text:line-break/>[-4, 0, 5, 1, 0, 1]<text:line-break/>Element that devides the said list of integers with the same sum value:<text:line-break/>1<text:line-break/></text:span><text:a xlink:type="simple" xlink:href="https://www.w3resource.com/python-exercises/list/python-data-type-list-exercise-273.php" office:target-frame-name="_blank" xlink:show="new" text:style-name="Internet_20_link" text:visited-style-name="Visited_20_Internet_20_Link">Click me to see the sample solution</text:a></text:p>
      <text:p text:style-name="P5"><text:span text:style-name="Strong_20_Emphasis"><text:span text:style-name="T1">274.</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ount the lowercase letters in a given list of words.<text:line-break/></text:span><text:span text:style-name="Strong_20_Emphasis"><text:span text:style-name="T1">Sample Data:</text:span></text:span><text:span text:style-name="T1"><text:line-break/>(["Red", "Green", "Blue", "White"]) -&gt; 13<text:line-break/>(["SQL", "C++", "C"]) -&gt; 0<text:line-break/></text:span><text:a xlink:type="simple" xlink:href="https://www.w3resource.com/python-exercises/list/python-data-type-list-exercise-274.php" office:target-frame-name="_blank" xlink:show="new" text:style-name="Internet_20_link" text:visited-style-name="Visited_20_Internet_20_Link">Click me to see the sample solution</text:a></text:p>
      <text:p text:style-name="P5"><text:soft-page-break/><text:span text:style-name="Strong_20_Emphasis"><text:span text:style-name="T1">275.</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add all elements of a list of integers except the number at index. Return the updated string.<text:line-break/></text:span><text:span text:style-name="Strong_20_Emphasis"><text:span text:style-name="T1">Sample Data:</text:span></text:span><text:span text:style-name="T1"><text:line-break/>([0, 9, 2, 4, 5, 6] -&gt; [26, 17, 24, 22, 21, 20]<text:line-break/>([-4, 0, 6, 1, 0, 2]) -&gt; [9, 5, -1, 4, 5, 3]<text:line-break/>([1, 2, 3]) -&gt; [5, 4, 3]<text:line-break/>([-4, 0, 5, 1, 0, 1]) -&gt; [7, 3, -2, 2, 3, 2]<text:line-break/></text:span><text:a xlink:type="simple" xlink:href="https://www.w3resource.com/python-exercises/list/python-data-type-list-exercise-275.php" office:target-frame-name="_blank" xlink:show="new" text:style-name="Internet_20_link" text:visited-style-name="Visited_20_Internet_20_Link">Click me to see the sample solution</text:a></text:p>
      <text:p text:style-name="P5"><text:span text:style-name="Strong_20_Emphasis"><text:span text:style-name="T1">276.</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find the largest odd number in a given list of integers.<text:line-break/></text:span><text:span text:style-name="Strong_20_Emphasis"><text:span text:style-name="T1">Sample Data:</text:span></text:span><text:span text:style-name="T1"><text:line-break/>([0, 9, 2, 4, 5, 6]) -&gt; 9<text:line-break/>([-4, 0, 6, 1, 0, 2]) -&gt; 1<text:line-break/>([1, 2, 3]) -&gt; 3<text:line-break/>([-4, 0, 5, 1, 0, 1]) -&gt; 5<text:line-break/></text:span><text:a xlink:type="simple" xlink:href="https://www.w3resource.com/python-exercises/list/python-data-type-list-exercise-276.php" office:target-frame-name="_blank" xlink:show="new" text:style-name="Internet_20_link" text:visited-style-name="Visited_20_Internet_20_Link">Click me to see the sample solution</text:a></text:p>
      <text:p text:style-name="P5"><text:span text:style-name="Strong_20_Emphasis"><text:span text:style-name="T1">277.</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calculate the largest and smallest gap between sorted elements of a list of integers.<text:line-break/></text:span><text:span text:style-name="Strong_20_Emphasis"><text:span text:style-name="T1">Sample Data:</text:span></text:span><text:span text:style-name="T1"><text:line-break/>{1, 2 ,9, 0, 4, 6} -&gt; 3<text:line-break/>{23, -2, 45, 38, 12, 4, 6} -&gt; 15<text:line-break/></text:span><text:a xlink:type="simple" xlink:href="https://www.w3resource.com/python-exercises/list/python-data-type-list-exercise-277.php" office:target-frame-name="_blank" xlink:show="new" text:style-name="Internet_20_link" text:visited-style-name="Visited_20_Internet_20_Link">Click me to see the sample solution</text:a></text:p>
      <text:p text:style-name="P4"><text:span text:style-name="Strong_20_Emphasis"><text:span text:style-name="T1">278.</text:span></text:span><text:span text:style-name="T1"> Write a Python program to sum the missing numbers in a given list of integers.<text:line-break/></text:span><text:span text:style-name="Strong_20_Emphasis"><text:span text:style-name="T1">Sample Data:</text:span></text:span><text:span text:style-name="T1"><text:line-break/>([0, 3, 4, 7, 9]) -&gt; 22<text:line-break/>([44, 45, 48]) -&gt; 93<text:line-break/>([-7, -5, -4, 0]) -&gt; -12<text:line-break/></text:span><text:a xlink:type="simple" xlink:href="https://www.w3resource.com/python-exercises/list/python-data-type-list-exercise-278.php" office:target-frame-name="_blank" xlink:show="new" text:style-name="Internet_20_link" text:visited-style-name="Visited_20_Internet_20_Link">Click me to see the sample solution</text:a></text:p>
      <text:p text:style-name="P5"><text:span text:style-name="Strong_20_Emphasis"><text:span text:style-name="T1">279.</text:span></text:span><text:span text:style-name="T1"> Write a </text:span><text:a xlink:type="simple" xlink:href="https://www.w3resource.com/python-exercises/list/#" text:style-name="Internet_20_link" text:visited-style-name="Visited_20_Internet_20_Link"> <text:span text:style-name="T2">Python</text:span></text:a><text:span text:style-name="T1"> program to extract the first specified number of vowels from a given string. If the specified number is less than the number of vowels present in the string then display "n is less than the number of vowels present in the string".<text:line-break/></text:span><text:span text:style-name="Strong_20_Emphasis"><text:span text:style-name="T1">Sample Data:</text:span></text:span><text:span text:style-name="T1"><text:line-break/>("</text:span><text:a xlink:type="simple" xlink:href="https://www.w3resource.com/python-exercises/list/#" text:style-name="Internet_20_link" text:visited-style-name="Visited_20_Internet_20_Link"> <text:span text:style-name="T2">Python</text:span></text:a><text:span text:style-name="T1">", 2) -&gt; "n is less than number of vowels present in the string."<text:line-break/>("Python Exercises", 3) -&gt; "oEe"<text:line-break/>("aeiou") -&gt; "AEI"<text:line-break/></text:span><text:a xlink:type="simple" xlink:href="https://www.w3resource.com/python-exercises/list/python-data-type-list-exercise-280.php" office:target-frame-name="_blank" xlink:show="new" text:style-name="Internet_20_link" text:visited-style-name="Visited_20_Internet_20_Link">Click me to see the sample solution</text:a></text:p>
      <text:p text:style-name="P4"><text:span text:style-name="Strong_20_Emphasis"><text:span text:style-name="T1">280.</text:span></text:span><text:span text:style-name="T1"> Write a Python program that takes a list of integers and finds all pairs of integers that differ by three. Return all pairs of integers in a list.<text:line-break/></text:span><text:soft-page-break/><text:span text:style-name="Strong_20_Emphasis"><text:span text:style-name="T1">Sample Data:</text:span></text:span><text:span text:style-name="T1"><text:line-break/>([0, 3, 4, 7, 9]) -&gt; [[0, 3], [4, 7]]<text:line-break/>[0, -3, -5, -7, -8] -&gt; [[-3, 0], [-8, -5]]<text:line-break/>([1, 2, 3, 4, 5]) -&gt; [[1, 4], [2, 5]]<text:line-break/>([100, 102, 103, 114, 115]) -&gt; [[100, 103]]</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in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9T14:12:54.340000000</meta:creation-date>
    <dc:date>2024-06-19T14:17:05.673000000</dc:date>
    <meta:editing-duration>PT1M43S</meta:editing-duration>
    <meta:editing-cycles>2</meta:editing-cycles>
    <meta:generator>LibreOffice/24.2.3.2$Windows_X86_64 LibreOffice_project/433d9c2ded56988e8a90e6b2e771ee4e6a5ab2ba</meta:generator>
    <meta:document-statistic meta:table-count="0" meta:image-count="0" meta:object-count="2" meta:page-count="59" meta:paragraph-count="286" meta:word-count="15342" meta:character-count="80805" meta:non-whitespace-character-count="65547"/>
  </office:meta>
</office:document-meta>
</file>